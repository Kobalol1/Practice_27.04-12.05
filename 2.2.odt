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A000003090B0DE2A5.png" manifest:media-type="image/png"/>
  <manifest:file-entry manifest:full-path="Pictures/10000001000004A90000009371F516CD.png" manifest:media-type="image/png"/>
  <manifest:file-entry manifest:full-path="Pictures/100000010000006F000000A20D8B1390.png" manifest:media-type="image/png"/>
  <manifest:file-entry manifest:full-path="Pictures/10000001000006AD000005B9B15CA329.png" manifest:media-type="image/png"/>
  <manifest:file-entry manifest:full-path="Pictures/100000010000012400000121D28E14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3.6cm" table:align="left"/>
    </style:style>
    <style:style style:name="Таблица1.A" style:family="table-column">
      <style:table-column-properties style:column-width="3.935cm"/>
    </style:style>
    <style:style style:name="Таблица1.B" style:family="table-column">
      <style:table-column-properties style:column-width="9.664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f1115" loext:opacity="100%" style:font-name="Times New Roman" fo:font-size="16.5pt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Times New Roman" fo:font-size="1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4" style:family="paragraph" style:parent-style-name="Table_20_Heading">
      <style:paragraph-properties fo:margin-left="0cm" fo:margin-right="0cm" style:line-height-at-least="0.661cm" fo:text-align="left" style:justify-single-word="false" fo:text-indent="0cm" style:auto-text-indent="false"/>
      <style:text-properties fo:font-variant="normal" fo:text-transform="none" style:font-name="Times New Roman" fo:font-size="11.25pt" fo:font-style="normal" fo:font-weight="bold"/>
    </style:style>
    <style:style style:name="P5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Times New Roman" fo:font-size="11.25pt" fo:font-style="normal" fo:font-weight="normal"/>
    </style:style>
    <style:style style:name="P6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7" style:family="paragraph" style:parent-style-name="Table_20_Contents">
      <style:paragraph-properties style:line-height-at-least="0.661cm"/>
      <style:text-properties fo:font-variant="normal" fo:text-transform="none" style:font-name="Times New Roman" fo:font-size="11.25pt" fo:font-style="normal" fo:font-weight="normal"/>
    </style:style>
    <style:style style:name="P8" style:family="paragraph" style:parent-style-name="Text_20_body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Times New Roman" fo:font-size="15pt" fo:letter-spacing="normal" fo:font-style="normal" fo:font-weight="bold" officeooo:rsid="0007c738" officeooo:paragraph-rsid="0007c738"/>
    </style:style>
    <style:style style:name="P9" style:family="paragraph" style:parent-style-name="Text_20_body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Times New Roman" fo:font-size="15pt" fo:letter-spacing="normal" fo:font-style="normal" fo:font-weight="bold" officeooo:paragraph-rsid="0007c738"/>
    </style:style>
    <style:style style:name="P10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officeooo:paragraph-rsid="0006dfb4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Times New Roman" fo:font-size="9.75pt" fo:font-style="normal" fo:font-weight="normal"/>
    </style:style>
    <style:style style:name="P1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15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  <style:text-properties officeooo:paragraph-rsid="0007c738"/>
    </style:style>
    <style:style style:name="P17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Times New Roman" fo:font-size="9pt" fo:background-color="#ffffff" loext:padding="0cm" loext:border="none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Times New Roman" fo:font-size="9.75pt" fo:font-style="normal" fo:font-weight="normal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style:font-name="Times New Roman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45649" loext:opacity="100%" style:font-name="Times New Roman" fo:font-size="9.75pt" fo:font-style="normal" fo:font-weight="normal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Times New Roman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Times New Roman" fo:font-size="9.75pt" fo:font-style="normal" fo:font-weight="normal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style:font-name="Times New Roman"/>
    </style:style>
    <style:style style:name="P2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Times New Roman" fo:font-size="15pt" fo:letter-spacing="normal" fo:font-style="normal" fo:font-weight="bold" officeooo:paragraph-rsid="0006dfb4"/>
    </style:style>
    <style:style style:name="P2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 officeooo:paragraph-rsid="0006dfb4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28" style:family="paragraph" style:parent-style-name="Horizontal_20_Line">
      <style:text-properties style:font-name="Times New Roman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Times New Roman" fo:font-size="9.75pt" fo:font-style="italic" fo:font-weight="normal"/>
    </style:style>
    <style:style style:name="P30" style:family="paragraph" style:parent-style-name="Standard">
      <style:text-properties style:font-name="Times New Roman"/>
    </style:style>
    <style:style style:name="T1" style:family="text">
      <style:text-properties fo:font-variant="normal" fo:text-transform="none" style:font-name="Times New Roman" fo:font-size="11.25pt" fo:font-style="normal" fo:font-weight="normal"/>
    </style:style>
    <style:style style:name="T2" style:family="text">
      <style:text-properties fo:font-variant="normal" fo:text-transform="none" style:font-name="Times New Roman" fo:font-size="9.75pt" fo:font-style="normal" fo:font-weight="normal" fo:background-color="#ebeef2" loext:char-shading-value="0" loext:padding="0cm" loext:border="none"/>
    </style:style>
    <style:style style:name="T3" style:family="text"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Times New Roman" fo:font-size="12pt" fo:letter-spacing="normal" fo:font-style="normal" fo:font-weight="bold" officeooo:rsid="0006dfb4"/>
    </style:style>
    <style:style style:name="T5" style:family="text">
      <style:text-properties fo:font-variant="normal" fo:text-transform="none" fo:color="#0f1115" loext:opacity="100%" style:font-name="Times New Roman" fo:font-size="9pt" fo:letter-spacing="normal" fo:font-style="normal" fo:font-weight="bold" officeooo:rsid="0006dfb4" fo:background-color="#ffffff" loext:char-shading-value="0" loext:padding="0cm" loext:border="none"/>
    </style:style>
    <style:style style:name="T6" style:family="text">
      <style:text-properties fo:color="#4078f2" loext:opacity="100%"/>
    </style:style>
    <style:style style:name="T7" style:family="text"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0f1115" loext:opacity="100%" style:font-name="Times New Roman" fo:font-size="12pt" fo:letter-spacing="normal" fo:font-style="normal" fo:font-weight="normal" fo:background-color="#ebeef2" loext:char-shading-value="0" loext:padding="0cm" loext:border="none"/>
    </style:style>
    <style:style style:name="T9" style:family="text">
      <style:text-properties fo:color="#50a14f" loext:opacity="100%"/>
    </style:style>
    <style:style style:name="T10" style:family="text">
      <style:text-properties fo:font-variant="normal" fo:text-transform="none" fo:color="#0f1115" loext:opacity="100%" style:font-name="Times New Roman" fo:font-size="12pt" fo:letter-spacing="normal" fo:font-style="normal" fo:font-weight="bold" fo:background-color="#ebeef2" loext:char-shading-value="0" loext:padding="0cm" loext:border="none"/>
    </style:style>
    <style:style style:name="T11" style:family="text">
      <style:text-properties fo:color="#383a42" loext:opacity="100%"/>
    </style:style>
    <style:style style:name="T12" style:family="text">
      <style:text-properties fo:color="#e45649" loext:opacity="100%"/>
    </style:style>
    <style:style style:name="T13" style:family="text">
      <style:text-properties fo:color="#b76b01" loext:opacity="100%"/>
    </style:style>
    <style:style style:name="T14" style:family="text">
      <style:text-properties fo:color="#a626a4" loext:opacity="100%"/>
    </style:style>
    <style:style style:name="T15" style:family="text">
      <style:text-properties fo:color="#a626a4" loext:opacity="100%" fo:font-size="9.75pt" fo:font-style="normal" fo:font-weight="normal"/>
    </style:style>
    <style:style style:name="T16" style:family="text">
      <style:text-properties fo:font-size="9.75pt" fo:font-style="normal" fo:font-weight="normal"/>
    </style:style>
    <style:style style:name="T17" style:family="text">
      <style:text-properties fo:color="#4078f2" loext:opacity="100%" fo:font-size="9.75pt" fo:font-style="normal" fo:font-weight="normal"/>
    </style:style>
    <style:style style:name="T18" style:family="text">
      <style:text-properties fo:color="#383a42" loext:opacity="100%" fo:font-size="9.75pt" fo:font-style="normal" fo:font-weight="normal"/>
    </style:style>
    <style:style style:name="T19" style:family="text">
      <style:text-properties fo:color="#50a14f" loext:opacity="100%" fo:font-size="9.75pt" fo:font-style="normal" fo:font-weight="normal"/>
    </style:style>
    <style:style style:name="T20" style:family="text">
      <style:text-properties fo:color="#b76b01" loext:opacity="100%" fo:font-size="9.75pt" fo:font-style="normal" fo:font-weight="normal"/>
    </style:style>
    <style:style style:name="T21" style:family="text">
      <style:text-properties fo:color="#e45649" loext:opacity="100%" fo:font-size="9.75pt" fo:font-style="normal" fo:font-weight="normal"/>
    </style:style>
    <style:style style:name="T22" style:family="text">
      <style:text-properties fo:font-variant="normal" fo:text-transform="none" fo:font-size="9.75pt" fo:font-style="normal" fo:font-weight="normal"/>
    </style:style>
    <style:style style:name="T23" style:family="text">
      <style:text-properties fo:font-variant="normal" fo:text-transform="none" fo:color="#4078f2" loext:opacity="100%" fo:font-size="9.75pt" fo:font-style="normal" fo:font-weight="normal"/>
    </style:style>
    <style:style style:name="T24" style:family="text">
      <style:text-properties fo:font-variant="normal" fo:text-transform="none" fo:color="#50a14f" loext:opacity="100%" fo:font-size="9.7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Практическая реализация календаря конференции в Grav CMS</text:h>
      <text:h text:style-name="P2" text:outline-level="3">Цель работы</text:h>
      <text:p text:style-name="P3">Настроить интерактивный календарь для отображения программы конференции на сайте кафедры, используя CMS Grav и библиотеку FullCalendar.</text:p>
      <text:h text:style-name="P2" text:outline-level="3">Используемые инструменты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">Инструмент</text:p>
            </table:table-cell>
            <table:table-cell table:style-name="Таблица1.A1" office:value-type="string">
              <text:p text:style-name="P4">Назначение</text:p>
            </table:table-cell>
          </table:table-row>
        </table:table-header-rows>
        <table:table-row>
          <table:table-cell table:style-name="Таблица1.A1" office:value-type="string">
            <text:p text:style-name="P5">Docker Desktop</text:p>
          </table:table-cell>
          <table:table-cell table:style-name="Таблица1.A1" office:value-type="string">
            <text:p text:style-name="P5">Запуск контейнера с Grav CMS</text:p>
          </table:table-cell>
        </table:table-row>
        <table:table-row>
          <table:table-cell table:style-name="Таблица1.A1" office:value-type="string">
            <text:p text:style-name="P5">PowerShell</text:p>
          </table:table-cell>
          <table:table-cell table:style-name="Таблица1.A1" office:value-type="string">
            <text:p text:style-name="P5">Выполнение команд для управления контейнером</text:p>
          </table:table-cell>
        </table:table-row>
        <table:table-row>
          <table:table-cell table:style-name="Таблица1.A1" office:value-type="string">
            <text:p text:style-name="P5">Блокнот (Notepad)</text:p>
          </table:table-cell>
          <table:table-cell table:style-name="Таблица1.A1" office:value-type="string">
            <text:p text:style-name="P6"><text:span text:style-name="T1">Создание и редактирование файла </text:span><text:span text:style-name="Source_20_Text"><text:span text:style-name="T2">default.md</text:span></text:span></text:p>
          </table:table-cell>
        </table:table-row>
        <table:table-row>
          <table:table-cell table:style-name="Таблица1.A1" office:value-type="string">
            <text:p text:style-name="P5">FullCalendar (v6.1.15)</text:p>
          </table:table-cell>
          <table:table-cell table:style-name="Таблица1.A1" office:value-type="string">
            <text:p text:style-name="P5">JavaScript-библиотека для отображения календаря</text:p>
          </table:table-cell>
        </table:table-row>
        <table:table-row>
          <table:table-cell table:style-name="Таблица1.A1" office:value-type="string">
            <text:p text:style-name="P5"><draw:frame draw:style-name="fr1" draw:name="Изображение2 Копия 1" text:anchor-type="char" svg:x="-0.635cm" svg:y="1.655cm" svg:width="16.201cm" svg:height="10.497cm" draw:z-index="3"><draw:image xlink:href="Pictures/100000010000032A000003090B0DE2A5.png" xlink:type="simple" xlink:show="embed" xlink:actuate="onLoad" draw:mime-type="image/png"/></draw:frame>Grav CMS</text:p>
          </table:table-cell>
          <table:table-cell table:style-name="Таблица1.A1" office:value-type="string">
            <text:p text:style-name="P7">Система управления контентом</text:p>
          </table:table-cell>
        </table:table-row>
      </table:table>
      <text:h text:style-name="P2" text:outline-level="3"/>
      <text:p text:style-name="P8"/>
      <text:p text:style-name="P8"/>
      <text:p text:style-name="P8"/>
      <text:p text:style-name="P9"/>
      <text:h text:style-name="P2" text:outline-level="3"><text:soft-page-break/>Ход выполнения работы</text:h>
      <text:h text:style-name="P10" text:outline-level="4">Шаг 1. Проверка работы контейнера Grav</text:h>
      <text:p text:style-name="P3">Перед началом работы необходимо убедиться, что контейнер с Grav CMS запущен и работает корректно.</text:p>
      <text:p text:style-name="P11"><text:span text:style-name="Strong_20_Emphasis"><text:span text:style-name="T3">Выполненная команда</text:span></text:span><text:span text:style-name="Strong_20_Emphasis"><text:span text:style-name="T4">(</text:span></text:span><text:span text:style-name="Strong_20_Emphasis"><text:span text:style-name="T5">powershell)</text:span></text:span><text:span text:style-name="Strong_20_Emphasis"><text:span text:style-name="T3">:</text:span></text:span></text:p>
      <text:p text:style-name="P12">docker <text:span text:style-name="T6">ps</text:span></text:p>
      <text:p text:style-name="P13"><text:span text:style-name="Strong_20_Emphasis"><text:span text:style-name="T3">Результат:</text:span></text:span></text:p>
      <text:p text:style-name="P13"><draw:frame draw:style-name="fr1" draw:name="Изображение1" text:anchor-type="char" svg:x="-0.3cm" svg:y="-0.067cm" svg:width="17cm" svg:height="1.66cm" draw:z-index="0"><draw:image xlink:href="Pictures/10000001000004A90000009371F516CD.png" xlink:type="simple" xlink:show="embed" xlink:actuate="onLoad" draw:mime-type="image/png"/></draw:frame><text:span text:style-name="Emphasis"><text:span text:style-name="T7"/></text:span></text:p>
      <text:p text:style-name="P14"><text:span text:style-name="Strong_20_Emphasis"><text:span text:style-name="T3">Вывод:</text:span></text:span><text:span text:style-name="T7"> Контейнер </text:span><text:span text:style-name="Source_20_Text"><text:span text:style-name="T8">grav</text:span></text:span><text:span text:style-name="T7"> работает, порт 8080 открыт, сайт доступен по адресу </text:span><text:span text:style-name="Source_20_Text"><text:span text:style-name="T8">http://localhost:8080</text:span></text:span><text:span text:style-name="T7">.</text:span></text:p>
      <text:h text:style-name="P10" text:outline-level="4">Шаг 2. Создание директории для страницы календаря</text:h>
      <text:p text:style-name="P3">Для размещения страницы календаря необходимо создать соответствующую папку в структуре Grav.</text:p>
      <text:p text:style-name="P11"><text:span text:style-name="Strong_20_Emphasis"><text:span text:style-name="T3">Выполненная команда</text:span></text:span><text:span text:style-name="Strong_20_Emphasis"><text:span text:style-name="T4">(</text:span></text:span><text:span text:style-name="Strong_20_Emphasis"><text:span text:style-name="T5">powershell)</text:span></text:span><text:span text:style-name="Strong_20_Emphasis"><text:span text:style-name="T3">:</text:span></text:span></text:p>
      <text:p text:style-name="P12">docker exec <text:span text:style-name="T6">-</text:span>it grav bash <text:span text:style-name="T6">-</text:span>c <text:span text:style-name="T9">"mkdir -p /var/www/html/user/pages/calendar"</text:span></text:p>
      <text:p text:style-name="P14"><text:span text:style-name="Strong_20_Emphasis"><text:span text:style-name="T3">Результат:</text:span></text:span><text:span text:style-name="T7"> Папка </text:span><text:span text:style-name="Source_20_Text"><text:span text:style-name="T8">calendar</text:span></text:span><text:span text:style-name="T7"> успешно создана в директории </text:span><text:span text:style-name="Source_20_Text"><text:span text:style-name="T8">/user/pages/</text:span></text:span><text:span text:style-name="T7">.</text:span></text:p>
      <text:h text:style-name="P15" text:outline-level="4"><text:span text:style-name="T3">Шаг 3. Создание файла страницы </text:span><text:span text:style-name="Source_20_Text"><text:span text:style-name="T10">default.md</text:span></text:span></text:h>
      <text:p text:style-name="P14"><text:span text:style-name="T7">Файл </text:span><text:span text:style-name="Source_20_Text"><text:span text:style-name="T8">default.md</text:span></text:span><text:span text:style-name="T7"> содержит содержимое страницы. Он был создан на рабочем столе с помощью текстового редактора.</text:span></text:p>
      <text:p text:style-name="P16"><text:span text:style-name="Strong_20_Emphasis"><text:span text:style-name="T3">Содержимое файла </text:span></text:span><text:span text:style-name="Strong_20_Emphasis"><text:span text:style-name="Source_20_Text"><text:span text:style-name="T8">default.md</text:span></text:span></text:span><text:span text:style-name="Strong_20_Emphasis"><text:span text:style-name="T3">:</text:span></text:span></text:p>
      <text:p text:style-name="P17">html</text:p>
      <text:p text:style-name="P12"><text:soft-page-break/>---</text:p>
      <text:p text:style-name="P18">title: 'Расписание конференции'</text:p>
      <text:p text:style-name="P18">---</text:p>
      <text:p text:style-name="P19"/>
      <text:p text:style-name="P12"><text:span text:style-name="T11">&lt;</text:span><text:span text:style-name="T12">div </text:span><text:span text:style-name="T13">id</text:span><text:span text:style-name="T11">=</text:span><text:span text:style-name="T9">"calendar"</text:span><text:span text:style-name="T11">&gt;&lt;/</text:span><text:span text:style-name="T12">div</text:span><text:span text:style-name="T11">&gt;</text:span></text:p>
      <text:p text:style-name="P19"/>
      <text:p text:style-name="P20"><text:span text:style-name="T11">&lt;</text:span>link <text:span text:style-name="T13">href</text:span><text:span text:style-name="T11">=</text:span><text:span text:style-name="T9">"https://cdn.jsdelivr.net/npm/fullcalendar@6.1.15/main.min.css"</text:span> <text:span text:style-name="T13">rel</text:span><text:span text:style-name="T11">=</text:span><text:span text:style-name="T9">"stylesheet"</text:span><text:span text:style-name="T11">&gt;</text:span></text:p>
      <text:p text:style-name="P12"><text:span text:style-name="T11">&lt;</text:span><text:span text:style-name="T12">script </text:span><text:span text:style-name="T13">src</text:span><text:span text:style-name="T11">=</text:span><text:span text:style-name="T9">"https://cdn.jsdelivr.net/npm/fullcalendar@6.1.15/index.global.min.js"</text:span><text:span text:style-name="T11">&gt;&lt;/</text:span><text:span text:style-name="T12">script</text:span><text:span text:style-name="T11">&gt;</text:span></text:p>
      <text:p text:style-name="P19"/>
      <text:p text:style-name="P20"><text:span text:style-name="T11">&lt;</text:span>script<text:span text:style-name="T11">&gt;</text:span></text:p>
      <text:p text:style-name="P12">document<text:span text:style-name="T11">.</text:span><text:span text:style-name="T6">addEventListener</text:span><text:span text:style-name="T11">(</text:span><text:span text:style-name="T9">'DOMContentLoaded'</text:span><text:span text:style-name="T11">,</text:span> <text:span text:style-name="T14">function</text:span><text:span text:style-name="T11">()</text:span> <text:span text:style-name="T11">{</text:span></text:p>
      <text:p text:style-name="P21"><text:s text:c="2"/><text:span text:style-name="T15">var</text:span><text:span text:style-name="T16"> calendarEl </text:span><text:span text:style-name="T17">=</text:span><text:span text:style-name="T16"> document</text:span><text:span text:style-name="T18">.</text:span><text:span text:style-name="T17">getElementById</text:span><text:span text:style-name="T18">(</text:span><text:span text:style-name="T19">'calendar'</text:span><text:span text:style-name="T18">);</text:span></text:p>
      <text:p text:style-name="P21"><text:s text:c="2"/><text:span text:style-name="T15">var</text:span><text:span text:style-name="T16"> calendar </text:span><text:span text:style-name="T17">=</text:span><text:span text:style-name="T16"> </text:span><text:span text:style-name="T15">new</text:span><text:span text:style-name="T16"> </text:span><text:span text:style-name="T20">FullCalendar</text:span><text:span text:style-name="T18">.</text:span><text:span text:style-name="T20">Calendar</text:span><text:span text:style-name="T18">(</text:span><text:span text:style-name="T16">calendarEl</text:span><text:span text:style-name="T18">,</text:span><text:span text:style-name="T16"> </text:span><text:span text:style-name="T18">{</text:span></text:p>
      <text:p text:style-name="P21"><text:s text:c="4"/><text:span text:style-name="T21">initialView</text:span><text:span text:style-name="T17">:</text:span><text:span text:style-name="T16"> </text:span><text:span text:style-name="T19">'dayGridMonth'</text:span><text:span text:style-name="T18">,</text:span></text:p>
      <text:p text:style-name="P21"><text:s text:c="4"/><text:span text:style-name="T21">locale</text:span><text:span text:style-name="T17">:</text:span><text:span text:style-name="T16"> </text:span><text:span text:style-name="T19">'ru'</text:span><text:span text:style-name="T18">,</text:span></text:p>
      <text:p text:style-name="P21"><text:s text:c="4"/><text:span text:style-name="T21">headerToolbar</text:span><text:span text:style-name="T17">:</text:span><text:span text:style-name="T16"> </text:span><text:span text:style-name="T18">{</text:span></text:p>
      <text:p text:style-name="P21"><text:s text:c="6"/><text:span text:style-name="T21">left</text:span><text:span text:style-name="T17">:</text:span><text:span text:style-name="T16"> </text:span><text:span text:style-name="T19">'prev,next today'</text:span><text:span text:style-name="T18">,</text:span></text:p>
      <text:p text:style-name="P21"><text:s text:c="6"/><text:span text:style-name="T21">center</text:span><text:span text:style-name="T17">:</text:span><text:span text:style-name="T16"> </text:span><text:span text:style-name="T19">'title'</text:span><text:span text:style-name="T18">,</text:span></text:p>
      <text:p text:style-name="P21"><text:s text:c="6"/><text:span text:style-name="T21">right</text:span><text:span text:style-name="T17">:</text:span><text:span text:style-name="T16"> </text:span><text:span text:style-name="T19">'dayGridMonth,timeGridWeek,timeGridDay'</text:span></text:p>
      <text:p text:style-name="P21"><text:s text:c="4"/><text:span text:style-name="T18">},</text:span></text:p>
      <text:p text:style-name="P21"><text:s text:c="4"/><text:span text:style-name="T21">buttonText</text:span><text:span text:style-name="T17">:</text:span><text:span text:style-name="T16"> </text:span><text:span text:style-name="T18">{</text:span></text:p>
      <text:p text:style-name="P21"><text:s text:c="6"/><text:span text:style-name="T21">today</text:span><text:span text:style-name="T17">:</text:span><text:span text:style-name="T16"> </text:span><text:span text:style-name="T19">'Сегодня'</text:span><text:span text:style-name="T18">,</text:span></text:p>
      <text:p text:style-name="P21"><text:s text:c="6"/><text:span text:style-name="T21">month</text:span><text:span text:style-name="T17">:</text:span><text:span text:style-name="T16"> </text:span><text:span text:style-name="T19">'Месяц'</text:span><text:span text:style-name="T18">,</text:span></text:p>
      <text:p text:style-name="P21"><text:s text:c="6"/><text:span text:style-name="T21">week</text:span><text:span text:style-name="T17">:</text:span><text:span text:style-name="T16"> </text:span><text:span text:style-name="T19">'Неделя'</text:span><text:span text:style-name="T18">,</text:span></text:p>
      <text:p text:style-name="P21"><text:s text:c="6"/><text:span text:style-name="T21">day</text:span><text:span text:style-name="T17">:</text:span><text:span text:style-name="T16"> </text:span><text:span text:style-name="T19">'День'</text:span></text:p>
      <text:p text:style-name="P21"><text:s text:c="4"/><text:span text:style-name="T18">},</text:span></text:p>
      <text:p text:style-name="P21"><text:s text:c="4"/><text:span text:style-name="T21">events</text:span><text:span text:style-name="T17">:</text:span><text:span text:style-name="T16"> </text:span><text:span text:style-name="T18">[</text:span></text:p>
      <text:p text:style-name="P21"><text:s text:c="6"/><text:span text:style-name="T18">{</text:span><text:span text:style-name="T16"> </text:span><text:span text:style-name="T21">title</text:span><text:span text:style-name="T17">:</text:span><text:span text:style-name="T16"> </text:span><text:span text:style-name="T19">'Открытие конференции'</text:span><text:span text:style-name="T18">,</text:span><text:span text:style-name="T16"> </text:span><text:span text:style-name="T21">start</text:span><text:span text:style-name="T17">:</text:span><text:span text:style-name="T16"> </text:span><text:span text:style-name="T19">'2026-05-20T10:00:00'</text:span><text:span text:style-name="T16"> </text:span><text:span text:style-name="T18">},</text:span></text:p>
      <text:p text:style-name="P21"><text:s text:c="6"/><text:span text:style-name="T18">{</text:span><text:span text:style-name="T16"> </text:span><text:span text:style-name="T21">title</text:span><text:span text:style-name="T17">:</text:span><text:span text:style-name="T16"> </text:span><text:span text:style-name="T19">'Секция "ИТ в образовании"'</text:span><text:span text:style-name="T18">,</text:span><text:span text:style-name="T16"> </text:span><text:span text:style-name="T21">start</text:span><text:span text:style-name="T17">:</text:span><text:span text:style-name="T16"> </text:span><text:span text:style-name="T19">'2026-05-20T12:00:00'</text:span><text:span text:style-name="T16"> </text:span><text:span text:style-name="T18">},</text:span></text:p>
      <text:p text:style-name="P21"><text:s text:c="6"/><text:span text:style-name="T18">{</text:span><text:span text:style-name="T16"> </text:span><text:span text:style-name="T21">title</text:span><text:span text:style-name="T17">:</text:span><text:span text:style-name="T16"> </text:span><text:span text:style-name="T19">'Круглый стол "Искусственный интеллект"'</text:span><text:span text:style-name="T18">,</text:span><text:span text:style-name="T16"> </text:span><text:span text:style-name="T21">start</text:span><text:span text:style-name="T17">:</text:span><text:span text:style-name="T16"> </text:span><text:span text:style-name="T19">'2026-05-21T10:00:00'</text:span><text:span text:style-name="T16"> </text:span><text:span text:style-name="T18">}</text:span></text:p>
      <text:p text:style-name="P21"><text:s text:c="4"/><text:span text:style-name="T18">]</text:span></text:p>
      <text:p text:style-name="P21"><text:s text:c="2"/><text:span text:style-name="T18">});</text:span></text:p>
      <text:p text:style-name="P21"><text:s text:c="2"/><text:span text:style-name="T16">calendar</text:span><text:span text:style-name="T18">.</text:span><text:span text:style-name="T17">render</text:span><text:span text:style-name="T18">();</text:span></text:p>
      <text:p text:style-name="P22">});</text:p>
      <text:p text:style-name="P20"><text:span text:style-name="T11">&lt;/</text:span>script<text:span text:style-name="T11">&gt;</text:span></text:p>
      <text:p text:style-name="P14"><draw:frame draw:style-name="fr1" draw:name="Изображение2" text:anchor-type="char" svg:x="0.03cm" svg:y="0.441cm" svg:width="2.937cm" svg:height="4.286cm" draw:z-index="1"><draw:image xlink:href="Pictures/100000010000006F000000A20D8B1390.png" xlink:type="simple" xlink:show="embed" xlink:actuate="onLoad" draw:mime-type="image/png"/></draw:frame><text:span text:style-name="Emphasis"><text:span text:style-name="T7"/></text:span></text:p>
      <text:p text:style-name="P14"><text:span text:style-name="Emphasis"><text:span text:style-name="T7"/></text:span></text:p>
      <text:p text:style-name="P14"><text:span text:style-name="Emphasis"><text:span text:style-name="T7"/></text:span></text:p>
      <text:h text:style-name="P10" text:outline-level="4"><text:soft-page-break/>Шаг 4. Копирование файла в контейнер</text:h>
      <text:p text:style-name="P3">Созданный файл был скопирован с рабочего стола внутрь контейнера Grav.</text:p>
      <text:p text:style-name="P11"><text:span text:style-name="Strong_20_Emphasis"><text:span text:style-name="T3">Выполненная команда</text:span></text:span><text:span text:style-name="Strong_20_Emphasis"><text:span text:style-name="T4">(</text:span></text:span><text:span text:style-name="Strong_20_Emphasis"><text:span text:style-name="T5">powershell)</text:span></text:span><text:span text:style-name="Strong_20_Emphasis"><text:span text:style-name="T3">:</text:span></text:span></text:p>
      <text:p text:style-name="P12">docker <text:span text:style-name="T6">cp</text:span> C:\Users\Kobalol\Desktop\default<text:span text:style-name="T11">.</text:span>md grav:<text:span text:style-name="T6">/</text:span><text:span text:style-name="T14">var</text:span><text:span text:style-name="T6">/</text:span>www/html/user/pages/calendar/default<text:span text:style-name="T11">.</text:span>md</text:p>
      <text:p text:style-name="P13"><text:span text:style-name="Strong_20_Emphasis"><text:span text:style-name="T3">Результат:</text:span></text:span></text:p>
      <text:p text:style-name="P12">Successfully copied 2.56kB to grav:/var/www/html/user/pages/calendar/default.md</text:p>
      <text:p text:style-name="P14"><text:span text:style-name="Emphasis"><text:span text:style-name="T7">(Вставьте сюда скриншот успешного выполнения команды </text:span></text:span><text:span text:style-name="Emphasis"><text:span text:style-name="Source_20_Text"><text:span text:style-name="T8">docker cp</text:span></text:span></text:span><text:span text:style-name="Emphasis"><text:span text:style-name="T7">)</text:span></text:span></text:p>
      <text:h text:style-name="P10" text:outline-level="4">Шаг 5. Очистка кэша Grav</text:h>
      <text:p text:style-name="P3">Для применения изменений необходимо очистить системный кэш.</text:p>
      <text:p text:style-name="P11"><text:span text:style-name="Strong_20_Emphasis"><text:span text:style-name="T3">Выполненная команда</text:span></text:span><text:span text:style-name="Strong_20_Emphasis"><text:span text:style-name="T4">(</text:span></text:span><text:span text:style-name="Strong_20_Emphasis"><text:span text:style-name="T5">powershell)</text:span></text:span><text:span text:style-name="Strong_20_Emphasis"><text:span text:style-name="T3">:</text:span></text:span></text:p>
      <text:p text:style-name="P12">docker exec <text:span text:style-name="T6">-</text:span>it grav bash <text:span text:style-name="T6">-</text:span>c <text:span text:style-name="T9">"rm -rf /var/www/html/cache/*"</text:span></text:p>
      <text:p text:style-name="P13"><text:span text:style-name="Strong_20_Emphasis"><text:span text:style-name="T3">Результат:</text:span></text:span><text:span text:style-name="T7"> Кэш успешно очищен.</text:span></text:p>
      <text:h text:style-name="P10" text:outline-level="4">Шаг 6. Включение поддержки HTML в Grav</text:h>
      <text:p text:style-name="P3">По умолчанию Grav не отображает HTML-код на страницах. Данная настройка была включена.</text:p>
      <text:p text:style-name="P11"><text:span text:style-name="Strong_20_Emphasis"><text:span text:style-name="T3">Выполненная команда</text:span></text:span><text:span text:style-name="Strong_20_Emphasis"><text:span text:style-name="T4">(</text:span></text:span><text:span text:style-name="Strong_20_Emphasis"><text:span text:style-name="T5">powershell)</text:span></text:span><text:span text:style-name="Strong_20_Emphasis"><text:span text:style-name="T3">:</text:span></text:span></text:p>
      <text:p text:style-name="P17">powershell</text:p>
      <text:p text:style-name="P12">docker exec <text:span text:style-name="T6">-</text:span>it grav bash <text:span text:style-name="T6">-</text:span>c <text:span text:style-name="T9">"sed -i 's/ <text:s/>html: false/ <text:s/>html: true/' /var/www/html/user/config/system.yaml"</text:span></text:p>
      <text:p text:style-name="P13"><text:span text:style-name="Strong_20_Emphasis"><text:span text:style-name="T3">Результат:</text:span></text:span><text:span text:style-name="T7"> Настройка изменена, HTML разрешён.</text:span></text:p>
      <text:p text:style-name="P3">После этого кэш был снова очищен:</text:p>
      <text:p text:style-name="P23"><text:span text:style-name="T22">docker exec </text:span><text:span text:style-name="T23">-</text:span><text:span text:style-name="T22">it grav bash </text:span><text:span text:style-name="T23">-</text:span><text:span text:style-name="T22">c </text:span><text:span text:style-name="T24">"rm -rf /var/www/html/cache/*"</text:span></text:p>
      <text:h text:style-name="P24" text:outline-level="3"><text:soft-page-break/>Результат работы</text:h>
      <text:p text:style-name="P25">После выполнения всех шагов страница календаря стала доступна по адресу:</text:p>
      <text:p text:style-name="P14"><text:span text:style-name="Source_20_Text"><text:span text:style-name="T8">http://localhost:8080/calendar</text:span></text:span></text:p>
      <text:p text:style-name="P13"><text:span text:style-name="Strong_20_Emphasis"><text:span text:style-name="T3">Итоговый вид страницы:</text:span></text:span></text:p>
      <text:p text:style-name="P13"><draw:frame draw:style-name="fr2" draw:name="Изображение3" text:anchor-type="char" svg:width="17cm" svg:height="14.573cm" draw:z-index="2"><draw:image xlink:href="Pictures/10000001000006AD000005B9B15CA329.png" xlink:type="simple" xlink:show="embed" xlink:actuate="onLoad" draw:mime-type="image/png"/></draw:frame><text:span text:style-name="Emphasis"><text:span text:style-name="T7"/></text:span></text:p>
      <text:p text:style-name="P13"><text:span text:style-name="Strong_20_Emphasis"><text:span text:style-name="T3"/></text:span></text:p>
      <text:p text:style-name="P13"><text:span text:style-name="Strong_20_Emphasis"><text:span text:style-name="T3">Демонстрация работы календаря:</text:span></text:span></text:p>
      <text:list text:style-name="L1">
        <text:list-item>
          <text:p text:style-name="P26"><text:span text:style-name="Strong_20_Emphasis"><text:span text:style-name="T3">Навигация по месяцам</text:span></text:span><text:span text:style-name="T7"> — кнопки «Prev» / «Next» работают корректно</text:span></text:p>
        </text:list-item>
        <text:list-item>
          <text:p text:style-name="P26"><text:span text:style-name="Strong_20_Emphasis"><text:span text:style-name="T3">Переключение видов</text:span></text:span><text:span text:style-name="T7"> — доступны режимы «Месяц», «Неделя», «День»</text:span></text:p>
        </text:list-item>
        <text:list-item>
          <text:p text:style-name="P26"><text:soft-page-break/><text:span text:style-name="Strong_20_Emphasis"><text:span text:style-name="T3">Отображение событий</text:span></text:span><text:span text:style-name="T7"> — на 20 мая отмечены «Открытие конференции» и «Секция ИТ в образовании», на 21 мая — «Круглый стол ИИ»</text:span></text:p>
        </text:list-item>
      </text:list>
      <text:p text:style-name="P13"><text:span text:style-name="Emphasis"><text:span text:style-name="T7">(Вставьте сюда скриншот календаря с открытым всплывающим окном события)</text:span></text:span></text:p>
      <text:h text:style-name="P2" text:outline-level="3">Вывод</text:h>
      <text:p text:style-name="P14"><text:span text:style-name="T7">В ходе практической работы был успешно развёрнут и настроен интерактивный календарь для сайта конференции на базе Grav CMS. Библиотека FullCalendar обеспечила удобное отображение программы мероприятий с возможностью навигации по датам и переключения между видами просмотра. Для обновления расписания достаточно отредактировать массив </text:span><text:span text:style-name="Source_20_Text"><text:span text:style-name="T8">events</text:span></text:span><text:span text:style-name="T7"> в файле </text:span><text:span text:style-name="Source_20_Text"><text:span text:style-name="T8">default.md</text:span></text:span><text:span text:style-name="T7"> и повторно скопировать его в контейнер.</text:span></text:p>
      <text:p text:style-name="P13"><text:span text:style-name="Strong_20_Emphasis"><text:span text:style-name="T3">Преимущества реализованного решения:</text:span></text:span></text:p>
      <text:list text:style-name="L2">
        <text:list-item>
          <text:p text:style-name="P27">Простота обновления событий</text:p>
        </text:list-item>
        <text:list-item>
          <text:p text:style-name="P27">Адаптивный дизайн</text:p>
        </text:list-item>
        <text:list-item>
          <text:p text:style-name="P27">Поддержка русского языка интерфейса</text:p>
        </text:list-item>
        <text:list-item>
          <text:p text:style-name="P27">Не требует установки дополнительных плагинов Grav</text:p>
        </text:list-item>
      </text:list>
      <text:p text:style-name="P28"/>
      <text:h text:style-name="P2" text:outline-level="3">Список выполненных команд (шпаргалка)</text:h>
      <text:p text:style-name="P17">powershell</text:p>
      <text:p text:style-name="P29"># Проверка контейнера</text:p>
      <text:p text:style-name="P12">docker <text:span text:style-name="T6">ps</text:span></text:p>
      <text:p text:style-name="P19"/>
      <text:p text:style-name="P29"># Создание папки</text:p>
      <text:p text:style-name="P12">docker exec <text:span text:style-name="T6">-</text:span>it grav bash <text:span text:style-name="T6">-</text:span>c <text:span text:style-name="T9">"mkdir -p /var/www/html/user/pages/calendar"</text:span></text:p>
      <text:p text:style-name="P19"/>
      <text:p text:style-name="P29"># Копирование файла</text:p>
      <text:p text:style-name="P12">docker <text:span text:style-name="T6">cp</text:span> C:\Users\Kobalol\Desktop\default<text:span text:style-name="T11">.</text:span>md grav:<text:span text:style-name="T6">/</text:span><text:span text:style-name="T14">var</text:span><text:span text:style-name="T6">/</text:span>www/html/user/pages/calendar/default<text:span text:style-name="T11">.</text:span>md</text:p>
      <text:p text:style-name="P19"/>
      <text:p text:style-name="P29"># Очистка кэша</text:p>
      <text:p text:style-name="P12">docker exec <text:span text:style-name="T6">-</text:span>it grav bash <text:span text:style-name="T6">-</text:span>c <text:span text:style-name="T9">"rm -rf /var/www/html/cache/*"</text:span></text:p>
      <text:p text:style-name="P19"/>
      <text:p text:style-name="P29"># Включение HTML</text:p>
      <text:p text:style-name="P12">docker exec <text:span text:style-name="T6">-</text:span>it grav bash <text:span text:style-name="T6">-</text:span>c <text:span text:style-name="T9">"sed -i 's/ <text:s/>html: false/ <text:s/>html: true/' /var/www/html/user/config/system.yaml"</text:span></text:p>
      <text:p text:style-name="P19"/>
      <text:p text:style-name="P29"># Повторная очистка кэша</text:p>
      <text:p text:style-name="P12">docker exec <text:span text:style-name="T6">-</text:span>it grav bash <text:span text:style-name="T6">-</text:span>c <text:span text:style-name="T9">"rm -rf /var/www/html/cache/*"</text:span></text:p>
      <text:p text:style-name="P30"><text:soft-page-break/></text:p>
      <text:p text:style-name="P30"><draw:frame draw:style-name="fr3" draw:name="Изображение1 Копия 1" text:anchor-type="char" svg:width="6.269cm" svg:height="6.205cm" draw:z-index="4"><draw:image xlink:href="Pictures/100000010000012400000121D28E14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20:42:38.955318700</meta:creation-date>
    <dc:date>2026-05-12T20:54:11.538802100</dc:date>
    <meta:editing-duration>PT10M57S</meta:editing-duration>
    <meta:editing-cycles>3</meta:editing-cycles>
    <meta:generator>LibreOffice/26.2.1.2$Windows_X86_64 LibreOffice_project/620$Build-2</meta:generator>
    <meta:document-statistic meta:table-count="1" meta:image-count="5" meta:object-count="0" meta:page-count="7" meta:paragraph-count="114" meta:word-count="575" meta:character-count="4920" meta:non-whitespace-character-count="4358"/>
  </office:meta>
</office:document-meta>
</file>