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20000004FC5E05A02F.png" manifest:media-type="image/png"/>
  <manifest:file-entry manifest:full-path="Pictures/100000010000032A000003090B0DE2A5.png" manifest:media-type="image/png"/>
  <manifest:file-entry manifest:full-path="Pictures/1000000100000EFD00000830AA875814.png" manifest:media-type="image/png"/>
  <manifest:file-entry manifest:full-path="Pictures/100000010000012400000121D28E14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429cm"/>
    </style:style>
    <style:style style:name="Таблица1.B" style:family="table-column">
      <style:table-column-properties style:column-width="4.068cm"/>
    </style:style>
    <style:style style:name="Таблица1.C" style:family="table-column">
      <style:table-column-properties style:column-width="9.504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" officeooo:rsid="0006817d" officeooo:paragraph-rsid="0006817d"/>
    </style:style>
    <style:style style:name="P2" style:family="paragraph" style:parent-style-name="Heading_20_3">
      <style:text-properties style:font-name="Times New Roman" officeooo:rsid="0006817d"/>
    </style:style>
    <style:style style:name="P3" style:family="paragraph" style:parent-style-name="Text_20_body">
      <style:text-properties style:font-name="Times New Roman" officeooo:rsid="0006817d" officeooo:paragraph-rsid="000b15f6"/>
    </style:style>
    <style:style style:name="P4" style:family="paragraph" style:parent-style-name="Text_20_body">
      <style:text-properties fo:font-variant="normal" fo:text-transform="none" fo:color="#0f1115" loext:opacity="100%" style:font-name="Times New Roman" fo:font-size="15pt" fo:letter-spacing="normal" fo:font-style="normal" fo:font-weight="bold" officeooo:rsid="000896aa" officeooo:paragraph-rsid="000b15f6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 officeooo:rsid="000896aa" style:font-weight-asian="bold" style:font-weight-complex="bold"/>
    </style:style>
    <style:style style:name="P6" style:family="paragraph" style:parent-style-name="Table_20_Heading">
      <style:paragraph-properties fo:margin-left="0cm" fo:margin-right="0cm" style:line-height-at-least="0.661cm" fo:text-align="left" style:justify-single-word="false" fo:text-indent="0cm" style:auto-text-indent="false"/>
      <style:text-properties fo:font-variant="normal" fo:text-transform="none" style:font-name="Times New Roman" fo:font-size="11.25pt" fo:font-style="normal" fo:font-weight="bold"/>
    </style:style>
    <style:style style:name="P7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8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9" style:family="paragraph" style:parent-style-name="Horizontal_20_Line">
      <style:paragraph-properties fo:margin-top="0cm" fo:margin-bottom="0.247cm" style:contextual-spacing="false" fo:line-height="115%"/>
      <style:text-properties style:font-name="Times New Roman" fo:font-weight="bold" officeooo:rsid="000896aa" style:font-weight-asian="bold" style:font-weight-complex="bold"/>
    </style:style>
    <style:style style:name="P10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Times New Roman" fo:font-size="15pt" fo:letter-spacing="normal" fo:font-style="normal" fo:font-weight="bold" officeooo:rsid="000896aa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weight="bold" officeooo:rsid="000896aa" style:font-weight-asian="bold" style:font-weight-complex="bold"/>
    </style:style>
    <style:style style:name="P12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Times New Roman" fo:font-size="12pt" fo:letter-spacing="normal" fo:font-style="normal" fo:font-weight="bold" officeooo:rsid="000896aa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weight="bold" officeooo:rsid="000896aa" style:font-weight-asian="bold" style:font-weight-complex="bold"/>
    </style:style>
    <style:style style:name="P14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Times New Roman" fo:font-size="9pt" fo:font-weight="bold" officeooo:rsid="000896aa" fo:background-color="#ffffff" style:font-weight-asian="bold" style:font-weight-complex="bold" loext:padding="0cm" loext:border="non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Times New Roman" fo:font-size="9.75pt" fo:font-style="normal" fo:font-weight="normal" officeooo:rsid="000896aa" style:font-weight-asian="bold" style:font-weight-complex="bold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Times New Roman" fo:font-size="9.75pt" fo:font-style="normal" fo:font-weight="normal" officeooo:rsid="000896aa" style:font-weight-asian="bold" style:font-weight-complex="bold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weight="bold" officeooo:rsid="000896aa" style:font-weight-asian="bold" style:font-weight-complex="bold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9" style:family="paragraph" style:parent-style-name="Text_20_body">
      <style:text-properties fo:font-weight="bold" officeooo:rsid="000896aa" style:font-weight-asian="bold" style:font-weight-complex="bold"/>
    </style:style>
    <style:style style:name="T1" style:family="text">
      <style:text-properties officeooo:rsid="000b15f6"/>
    </style:style>
    <style:style style:name="T2" style:family="text">
      <style:text-properties fo:font-variant="normal" fo:text-transform="none" style:font-name="Times New Roman" fo:font-size="11.25pt" fo:font-style="normal" fo:font-weight="bold"/>
    </style:style>
    <style:style style:name="T3" style:family="text">
      <style:text-properties fo:font-variant="normal" fo:text-transform="none" fo:color="#3964fe" loext:opacity="100%" style:text-line-through-style="none" style:text-line-through-type="none" style:font-name="Times New Roman" fo:font-size="11.25pt" fo:font-style="normal" style:text-underline-style="none" fo:font-weight="bold" style:text-blinking="false" loext:padding="0.049cm" loext:border="1.5pt solid #ffffff"/>
    </style:style>
    <style:style style:name="T4" style:family="text">
      <style:text-properties fo:font-variant="normal" fo:text-transform="none" style:font-name="Times New Roman" fo:font-size="11.25pt" fo:font-style="normal" fo:font-weight="normal"/>
    </style:style>
    <style:style style:name="T5" style:family="text">
      <style:text-properties fo:font-variant="normal" fo:text-transform="none" style:font-name="Times New Roman" fo:font-size="9.75pt" fo:font-style="normal" fo:font-weight="normal" fo:background-color="#ebeef2" loext:char-shading-value="0" loext:padding="0cm" loext:border="none"/>
    </style:style>
    <style:style style:name="T6" style:family="text">
      <style:text-properties fo:font-variant="normal" fo:text-transform="none" fo:color="#3964fe" loext:opacity="100%" style:text-line-through-style="none" style:text-line-through-type="none" style:font-name="Times New Roman" fo:font-size="11.25pt" fo:font-style="normal" style:text-underline-style="none" fo:font-weight="normal" style:text-blinking="false" loext:padding="0.049cm" loext:border="1.5pt solid #ffffff"/>
    </style:style>
    <style:style style:name="T7" style:family="text"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3964fe" loext:opacity="100%" style:text-line-through-style="none" style:text-line-through-type="none" style:font-name="Times New Roman" fo:font-size="12pt" fo:letter-spacing="normal" fo:font-style="normal" style:text-underline-style="none" fo:font-weight="bold" style:text-blinking="false" loext:padding="0.049cm" loext:border="1.5pt solid #ffffff"/>
    </style:style>
    <style:style style:name="T9" style:family="text">
      <style:text-properties fo:font-variant="normal" fo:text-transform="none" fo:color="#0f1115" loext:opacity="100%" style:font-name="Times New Roman" fo:font-size="12pt" fo:letter-spacing="normal" fo:font-style="normal" fo:font-weight="normal" fo:background-color="#ebeef2" loext:char-shading-value="0" loext:padding="0cm" loext:border="none"/>
    </style:style>
    <style:style style:name="T10" style:family="text">
      <style:text-properties fo:font-variant="normal" fo:text-transform="none" fo:color="#0f1115" loext:opacity="100%" style:font-name="Times New Roman" fo:font-size="12pt" fo:letter-spacing="normal" fo:font-style="normal" fo:font-weight="bold" officeooo:rsid="000896aa"/>
    </style:style>
    <style:style style:name="T11" style:family="text">
      <style:text-properties fo:font-variant="normal" fo:text-transform="none" fo:color="#0f1115" loext:opacity="100%" style:font-name="Times New Roman" fo:font-size="12pt" fo:letter-spacing="normal" fo:font-style="normal" fo:font-weight="normal" officeooo:rsid="000896aa" style:font-weight-asian="bold" style:font-weight-complex="bol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Белышев Андрей Сергеевич 1зб_ИВТ(ускор.)</text:span><text:line-break/><text:line-break/>Отчет по подбору и установке плагинов Grav CMS</text:p>
      <text:h text:style-name="P2" text:outline-level="3">Часть 1. Анализ расширений для сайта кафедры</text:h>
      <text:p text:style-name="P3">На основе анализа функций сайта кафедры ИТиЭО и современных требований к университетским веб-ресурсам составлена таблица направлений развития и соответствующих плагинов Grav CMS.</text:p>
      <text:p text:style-name="P4">Часть 1. Таблица расширений для организации конференции</text:p>
      <text:p text:style-name="P5">Для реализации направления «проведение конференции» на сайте кафедры были проанализированы доступные плагины для Grav CMS. Основные задачи: публикация программы мероприятий, управление временными слотами (расписание), регистрация участников через формы, архивация докладов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6">Направление</text:p>
            </table:table-cell>
            <table:table-cell table:style-name="Таблица1.A1" office:value-type="string">
              <text:p text:style-name="P6">Название / Ссылка на плагин</text:p>
            </table:table-cell>
            <table:table-cell table:style-name="Таблица1.A1" office:value-type="string">
              <text:p text:style-name="P6">Краткое описание и комментарий</text:p>
            </table:table-cell>
          </table:table-row>
        </table:table-header-rows>
        <table:table-row>
          <table:table-cell table:style-name="Таблица1.A1" office:value-type="string">
            <text:p text:style-name="P7"><text:span text:style-name="Strong_20_Emphasis"><text:span text:style-name="T2">Управление расписанием и событиями</text:span></text:span></text:p>
          </table:table-cell>
          <table:table-cell table:style-name="Таблица1.A1" office:value-type="string">
            <text:p text:style-name="P7"><text:a xlink:type="simple" xlink:href="https://github.com/rkl110/grav-plugin-fullcalendar" office:target-frame-name="_blank" xlink:show="new" text:style-name="Internet_20_link" text:visited-style-name="Visited_20_Internet_20_Link"><text:span text:style-name="Strong_20_Emphasis"><text:span text:style-name="T3">Fullcalendar</text:span></text:span></text:a><text:span text:style-name="T4"> 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Плагин читает ICS-файлы календаря и отображает события в виде сетки (месяц/неделя/день). Поддерживает показ изображений, привязанных к конкретному месяцу (например, фото докладчиков или тематические баннеры).<text:line-break/><text:line-break/></text:span><text:span text:style-name="Strong_20_Emphasis"><text:span text:style-name="T2">Почему выбран:</text:span></text:span><text:span text:style-name="T4"> Для конференции критически важно наглядно представить программу по дням и времени. Fullcalendar позволяет синхронизировать данные с внешними источниками (CalDav) и имеет удобный виджет для быстрой навигации, что идеально подходит для динамичного расписания секций 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Регистрация участников и сбор заявок</text:span></text:span></text:p>
          </table:table-cell>
          <table:table-cell table:style-name="Таблица1.A1" office:value-type="string">
            <text:p text:style-name="P7"><text:a xlink:type="simple" xlink:href="https://github.com/getgrav/grav-plugin-form" office:target-frame-name="_blank" xlink:show="new" text:style-name="Internet_20_link" text:visited-style-name="Visited_20_Internet_20_Link"><text:span text:style-name="Strong_20_Emphasis"><text:span text:style-name="T3">Form</text:span></text:span></text:a><text:span text:style-name="T4"> 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Это ядро форм в Grav. Позволяет создавать сложные формы через YAML-конфигурацию (текст, email, select, файлы). Поддерживает валидацию, отправку писем и интеграцию с внешними API через процессы (processes).<text:line-break/><text:line-break/></text:span><text:span text:style-name="Strong_20_Emphasis"><text:span text:style-name="T2">Почему выбран:</text:span></text:span><text:span text:style-name="T4"> Незаменим для сбора заявок на участие, отправки тезисов докладов или регистрации слушателей. Без этого плагина невозможно организовать обратную связь с потенциальными </text:span><text:soft-page-break/><text:span text:style-name="T4">участниками конференции 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Прием тезисов и управление контентом</text:span></text:span></text:p>
          </table:table-cell>
          <table:table-cell table:style-name="Таблица1.A1" office:value-type="string">
            <text:p text:style-name="P7"><text:a xlink:type="simple" xlink:href="https://github.com/getgrav/grav-plugin-admin" office:target-frame-name="_blank" xlink:show="new" text:style-name="Internet_20_link" text:visited-style-name="Visited_20_Internet_20_Link"><text:span text:style-name="Strong_20_Emphasis"><text:span text:style-name="T3">Admin</text:span></text:span></text:a><text:span text:style-name="T4"> (встроенный)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Панель управления Grav. Позволяет модерировать входящий контент, управлять правами доступа пользователей и редактировать страницы разделов конференции из браузера.<text:line-break/><text:line-break/></text:span><text:span text:style-name="Strong_20_Emphasis"><text:span text:style-name="T2">Почему выбран:</text:span></text:span><text:span text:style-name="T4"> Оргкомитету конференции нужен удобный интерфейс для быстрого добавления новостей, изменений в программе или публикации принятых статей без доступа к коду сайта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Архивация докладов (PDF)</text:span></text:span></text:p>
          </table:table-cell>
          <table:table-cell table:style-name="Таблица1.A1" office:value-type="string">
            <text:p text:style-name="P7"><text:a xlink:type="simple" xlink:href="https://github.com/getgrav/grav-plugin-shortcode-core" office:target-frame-name="_blank" xlink:show="new" text:style-name="Internet_20_link" text:visited-style-name="Visited_20_Internet_20_Link"><text:span text:style-name="Strong_20_Emphasis"><text:span text:style-name="T3">Shortcode Core</text:span></text:span></text:a><text:span text:style-name="T4"> </text:span></text:p>
          </table:table-cell>
          <table:table-cell table:style-name="Таблица1.A1" office:value-type="string">
            <text:p text:style-name="P8"><text:span text:style-name="Strong_20_Emphasis"><text:span text:style-name="T2">Описание:</text:span></text:span><text:span text:style-name="T4"> Добавляет функциональность Shortcode (как в WordPress). Позволяет вставлять сложные элементы (вроде ссылок на скачивание PDF) с помощью короткого кода </text:span><text:span text:style-name="Source_20_Text"><text:span text:style-name="T5">[pdf]ссылка.pdf[/pdf]</text:span></text:span><text:span text:style-name="T4">.<text:line-break/><text:line-break/></text:span><text:span text:style-name="Strong_20_Emphasis"><text:span text:style-name="T2">Почему выбран:</text:span></text:span><text:span text:style-name="T4"> Сборник материалов конференции — стандартная практика. Плагин упрощает верстку страницы архива, позволяя создавать красивые кнопки для скачивания сборников и сертификатов, используя простую разметку 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SEO и продвижение конференции</text:span></text:span></text:p>
          </table:table-cell>
          <table:table-cell table:style-name="Таблица1.A1" office:value-type="string">
            <text:p text:style-name="P7"><text:a xlink:type="simple" xlink:href="https://github.com/getgrav/grav-plugin-aura" office:target-frame-name="_blank" xlink:show="new" text:style-name="Internet_20_link" text:visited-style-name="Visited_20_Internet_20_Link"><text:span text:style-name="Strong_20_Emphasis"><text:span text:style-name="T3">Aura</text:span></text:span></text:a><text:span text:style-name="T4"> 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Добавляет мета-теги, Open Graph и структурированные данные (</text:span><text:a xlink:type="simple" xlink:href="https://schema.org/" office:target-frame-name="_blank" xlink:show="new" text:style-name="Internet_20_link" text:visited-style-name="Visited_20_Internet_20_Link"><text:span text:style-name="T6">Schema.org</text:span></text:a><text:span text:style-name="T4">) для страниц сайта.<text:line-break/><text:line-break/></text:span><text:span text:style-name="Strong_20_Emphasis"><text:span text:style-name="T2">Почему выбран:</text:span></text:span><text:span text:style-name="T4"> Для привлечения участников важно, чтобы информация о конференции красиво отображалась в соцсетях (Open Graph) и поисковых системах. Aura автоматизирует этот процесс .</text:span></text:p>
          </table:table-cell>
        </table:table-row>
      </table:table>
      <text:p text:style-name="P9"><text:soft-page-break/></text:p>
      <text:h text:style-name="P10" text:outline-level="3">Часть 2. Практическая установка, настройка и демонстрация работы плагина</text:h>
      <text:p text:style-name="P11"><text:span text:style-name="T7">Для демонстрации работы был выбран плагин </text:span><text:a xlink:type="simple" xlink:href="https://github.com/rkl110/grav-plugin-fullcalendar" office:target-frame-name="_blank" xlink:show="new" text:style-name="Internet_20_link" text:visited-style-name="Visited_20_Internet_20_Link"><text:span text:style-name="Strong_20_Emphasis"><text:span text:style-name="T8">Fullcalendar</text:span></text:span></text:a><text:span text:style-name="T7"> , так как визуальное расписание — это сердце любого сайта конференции.</text:span><draw:frame draw:style-name="fr1" draw:name="Изображение2" text:anchor-type="char" svg:width="17cm" svg:height="16.305cm" draw:z-index="1"><draw:image xlink:href="Pictures/100000010000032A000003090B0DE2A5.png" xlink:type="simple" xlink:show="embed" xlink:actuate="onLoad" draw:mime-type="image/png"/></draw:frame></text:p>
      <text:h text:style-name="P12" text:outline-level="4">Подготовка данных для расписания</text:h>
      <text:p text:style-name="P5">Плагин Fullcalendar работает с ICS-файлами (календари). Для тестирования создадим тестовый ICS-файл вручную или используем стандартный пример.</text:p>
      <text:list text:style-name="L1">
        <text:list-item>
          <text:p text:style-name="P13"><text:span text:style-name="T7">В корне сайта Grav создаем папку для данных (если ее нет): </text:span><text:span text:style-name="Source_20_Text"><text:span text:style-name="T9">user/data/calendars</text:span></text:span><text:span text:style-name="T7"> .</text:span></text:p>
        </text:list-item>
        <text:list-item>
          <text:p text:style-name="P13"><text:soft-page-break/><text:span text:style-name="T7">Помещаем в эту папку ICS-файл с событиями. Для демонстрации создадим файл </text:span><text:span text:style-name="Source_20_Text"><text:span text:style-name="T9">conference.ics</text:span></text:span><text:span text:style-name="T7"> с примером события:</text:span></text:p>
        </text:list-item>
      </text:list>
      <text:p text:style-name="P14">text</text:p>
      <text:p text:style-name="P15">BEGIN:VCALENDAR</text:p>
      <text:p text:style-name="P16">VERSION:2.0</text:p>
      <text:p text:style-name="P16">BEGIN:VEVENT</text:p>
      <text:p text:style-name="P16">SUMMARY:Открытие конференции</text:p>
      <text:p text:style-name="P16">DTSTART:20260520T100000Z</text:p>
      <text:p text:style-name="P16">DTEND:20260520T113000Z</text:p>
      <text:p text:style-name="P16">LOCATION:Актовый зал</text:p>
      <text:p text:style-name="P16">DESCRIPTION:Приветственное слово ректора</text:p>
      <text:p text:style-name="P16">END:VEVENT</text:p>
      <text:p text:style-name="P16">END:VCALENDAR</text:p>
      <text:p text:style-name="P16"/>
      <text:p text:style-name="P16"/>
      <text:p text:style-name="P17"><draw:frame draw:style-name="fr1" draw:name="Изображение3" text:anchor-type="char" svg:width="17cm" svg:height="16.025cm" draw:z-index="2"><draw:image xlink:href="Pictures/1000000100000420000004FC5E05A02F.png" xlink:type="simple" xlink:show="embed" xlink:actuate="onLoad" draw:mime-type="image/png"/></draw:frame><text:span text:style-name="Emphasis"><text:span text:style-name="T7"/></text:span></text:p>
      <text:h text:style-name="P12" text:outline-level="4"><text:soft-page-break/>Демонстрация работы</text:h>
      <text:p text:style-name="P5">После сохранения страницы конференции переходим на сайт для просмотра результата.</text:p>
      <text:p text:style-name="P11"><draw:frame draw:style-name="fr2" draw:name="Изображение4" text:anchor-type="char" svg:width="17cm" svg:height="9.285cm" draw:z-index="3"><draw:image xlink:href="Pictures/1000000100000EFD00000830AA875814.png" xlink:type="simple" xlink:show="embed" xlink:actuate="onLoad" draw:mime-type="image/png"/></draw:frame><text:span text:style-name="Emphasis"><text:span text:style-name="T7"/></text:span></text:p>
      <text:p text:style-name="P18"><text:span text:style-name="Strong_20_Emphasis"><text:span text:style-name="T10">Комментарий к работе:</text:span></text:span><text:span text:style-name="T11"><text:line-break/></text:span><text:span text:style-name="T7">В ходе проверки установлено, что плагин корректно обработал ICS-файл, на основе которого был сформирован и выведен на экран интерактивный календарь. Тестирование подтвердило его штатную работу: пользователю доступна навигация по месяцам, а для получения детальной информации (времени, описания) необходимо кликнуть по выбранному событию. В целях улучшения визуального восприятия сайта конференции можно разместить в директории страницы тематические изображения месяцев (например, «январь.jpg», «февраль.jpg»), которые будут отображаться над календарной сеткой.</text:span><text:span text:style-name="T12"> </text:span></text:p>
      <text:p text:style-name="P5"><text:span text:style-name="Strong_20_Emphasis"><text:span text:style-name="T13">Вывод:</text:span></text:span><text:span text:style-name="T12"> Использование плагина Fullcalendar является эффективным решением для публикации расписания конференций. Основное преимущество — простота актуализации данных: любые изменения в программе вносятся в единственный ICS-файл, после чего контент на сайте перезаписывается автоматически, без необходимости ручного редактирования страниц.</text:span> </text:p>
      <text:p text:style-name="P5"><draw:frame draw:style-name="fr3" draw:name="Изображение1" text:anchor-type="char" svg:width="6.269cm" svg:height="6.205cm" draw:z-index="0"><draw:image xlink:href="Pictures/100000010000012400000121D28E1403.png" xlink:type="simple" xlink:show="embed" xlink:actuate="onLoad" draw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9T14:17:12.889241500</meta:creation-date>
    <meta:print-date>2026-04-29T15:18:57.833614200</meta:print-date>
    <meta:printed-by>Файлы PDF</meta:printed-by>
    <dc:date>2026-05-12T19:28:24.982734100</dc:date>
    <meta:editing-duration>PT37M35S</meta:editing-duration>
    <meta:editing-cycles>5</meta:editing-cycles>
    <meta:generator>LibreOffice/26.2.1.2$Windows_X86_64 LibreOffice_project/620$Build-2</meta:generator>
    <meta:document-statistic meta:table-count="1" meta:image-count="4" meta:object-count="0" meta:page-count="5" meta:paragraph-count="44" meta:word-count="563" meta:character-count="4660" meta:non-whitespace-character-count="4128"/>
  </office:meta>
</office:document-meta>
</file>