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6D0000025F6BE0A5F2.png" manifest:media-type="image/png"/>
  <manifest:file-entry manifest:full-path="Pictures/1000000100000F00000007C16D909F0B.png" manifest:media-type="image/png"/>
  <manifest:file-entry manifest:full-path="Pictures/100000010000037200000261055C4A66.png" manifest:media-type="image/png"/>
  <manifest:file-entry manifest:full-path="Pictures/10000001000007710000043A8CB585D9.png" manifest:media-type="image/png"/>
  <manifest:file-entry manifest:full-path="Pictures/1000000100000507000004304FF0E5CD.png" manifest:media-type="image/png"/>
  <manifest:file-entry manifest:full-path="Pictures/10000001000006AA000004E12497B76A.png" manifest:media-type="image/png"/>
  <manifest:file-entry manifest:full-path="Pictures/10000001000005D1000001E406C283BB.png" manifest:media-type="image/png"/>
  <manifest:file-entry manifest:full-path="Pictures/1000000100000F000000083E47E4369F.png" manifest:media-type="image/png"/>
  <manifest:file-entry manifest:full-path="Pictures/10000000000006000000040083B435E8.png" manifest:media-type="image/png"/>
  <manifest:file-entry manifest:full-path="Pictures/100000010000012400000121D28E140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9cdfd" officeooo:paragraph-rsid="0019cdfd" style:font-size-asian="12pt" style:font-size-complex="12pt"/>
    </style:style>
    <style:style style:name="P2" style:family="paragraph" style:parent-style-name="Text_20_body">
      <style:text-properties fo:font-size="12pt" officeooo:rsid="0019cdfd" officeooo:paragraph-rsid="0019cdfd" style:font-size-asian="12pt" style:font-size-complex="12pt"/>
    </style:style>
    <style:style style:name="P3" style:family="paragraph" style:parent-style-name="Heading_20_4">
      <style:text-properties fo:font-size="12pt" officeooo:rsid="0019cdfd" style:font-size-asian="12pt" style:font-size-complex="12pt"/>
    </style:style>
    <style:style style:name="P4" style:family="paragraph" style:parent-style-name="Text_20_body">
      <style:text-properties fo:font-size="12pt" officeooo:rsid="0019cdfd" style:font-size-asian="12pt" style:font-size-complex="12pt"/>
    </style:style>
    <style:style style:name="P5" style:family="paragraph" style:parent-style-name="Text_20_body" style:list-style-name="L1">
      <style:text-properties fo:font-size="12pt" officeooo:rsid="0019cdfd" style:font-size-asian="12pt" style:font-size-complex="12pt"/>
    </style:style>
    <style:style style:name="P6" style:family="paragraph" style:parent-style-name="Text_20_body" style:list-style-name="L1">
      <style:text-properties officeooo:rsid="0019cdfd"/>
    </style:style>
    <style:style style:name="P7" style:family="paragraph" style:parent-style-name="Heading_20_4">
      <style:text-properties fo:font-size="12pt" officeooo:rsid="0019cdfd" officeooo:paragraph-rsid="0019cdfd" style:font-size-asian="12pt" style:font-size-complex="12pt"/>
    </style:style>
    <style:style style:name="P8" style:family="paragraph" style:parent-style-name="Text_20_body" style:list-style-name="L2">
      <style:text-properties officeooo:rsid="0019cdfd"/>
    </style:style>
    <style:style style:name="P9" style:family="paragraph" style:parent-style-name="Text_20_body" style:list-style-name="L2">
      <style:text-properties fo:font-size="12pt" officeooo:rsid="0019cdfd" style:font-size-asian="12pt" style:font-size-complex="12pt"/>
    </style:style>
    <style:style style:name="P10" style:family="paragraph" style:parent-style-name="Preformatted_20_Text" style:list-style-name="L2">
      <style:paragraph-properties fo:margin-top="0cm" fo:margin-bottom="0.499cm" style:contextual-spacing="false"/>
      <style:text-properties fo:font-size="12pt" officeooo:rsid="0019cdfd" style:font-size-asian="12pt" style:font-size-complex="12pt"/>
    </style:style>
    <style:style style:name="P11" style:family="paragraph" style:parent-style-name="Text_20_body">
      <style:text-properties officeooo:rsid="0019cdfd" officeooo:paragraph-rsid="0019cdfd"/>
    </style:style>
    <style:style style:name="P12" style:family="paragraph" style:parent-style-name="Preformatted_20_Text">
      <style:paragraph-properties fo:margin-top="0cm" fo:margin-bottom="0.499cm" style:contextual-spacing="false"/>
      <style:text-properties fo:font-size="12pt" officeooo:rsid="0019cdfd" style:font-size-asian="12pt" style:font-size-complex="12pt"/>
    </style:style>
    <style:style style:name="P13" style:family="paragraph" style:parent-style-name="Standard">
      <style:text-properties officeooo:rsid="0019cdfd" officeooo:paragraph-rsid="0019cdfd"/>
    </style:style>
    <style:style style:name="P14" style:family="paragraph" style:parent-style-name="Standard">
      <style:text-properties fo:font-size="12pt" fo:font-weight="bold" officeooo:rsid="0019cdfd" officeooo:paragraph-rsid="0019cdfd" style:font-size-asian="12pt" style:font-weight-asian="bold" style:font-size-complex="12pt" style:font-weight-complex="bold"/>
    </style:style>
    <style:style style:name="P15" style:family="paragraph" style:parent-style-name="Text_20_body" style:list-style-name="L3">
      <style:text-properties officeooo:rsid="0019cdfd"/>
    </style:style>
    <style:style style:name="P16" style:family="paragraph" style:parent-style-name="Text_20_body" style:list-style-name="L3">
      <style:paragraph-properties fo:margin-left="1cm" fo:margin-right="1cm" fo:text-indent="0cm" style:auto-text-indent="false"/>
      <style:text-properties officeooo:rsid="0019cdfd"/>
    </style:style>
    <style:style style:name="P17" style:family="paragraph" style:parent-style-name="Text_20_body" style:list-style-name="L3">
      <style:text-properties fo:font-size="12pt" officeooo:rsid="0019cdfd" style:font-size-asian="12pt" style:font-size-complex="12pt"/>
    </style:style>
    <style:style style:name="P18" style:family="paragraph" style:parent-style-name="Preformatted_20_Text" style:list-style-name="L3">
      <style:paragraph-properties fo:margin-top="0cm" fo:margin-bottom="0.499cm" style:contextual-spacing="false"/>
      <style:text-properties fo:font-size="12pt" officeooo:rsid="0019cdfd" style:font-size-asian="12pt" style:font-size-complex="12pt"/>
    </style:style>
    <style:style style:name="P19" style:family="paragraph" style:parent-style-name="Standard">
      <style:text-properties officeooo:paragraph-rsid="0019cdfd"/>
    </style:style>
    <style:style style:name="T1" style:family="text">
      <style:text-properties fo:font-family="'Times New Roman'" style:font-family-generic="roman" style:font-pitch="variable" officeooo:rsid="000b15f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letter-spacing="normal" fo:font-style="normal" fo:font-weight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9cdfd" style:font-size-asian="12pt" style:font-size-complex="12pt"/>
    </style:style>
    <style:style style:name="T6" style:family="text">
      <style:text-properties fo:font-size="12pt" fo:font-weight="bold" officeooo:rsid="0019cdf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Белышев Андрей Сергеевич 1зб_ИВТ(ускор.)</text:span><text:line-break/><text:line-break/><text:span text:style-name="T2">Отчет по заданию 1.1</text:span></text:p>
      <text:p text:style-name="P1"/>
      <text:p text:style-name="P2"><text:span text:style-name="T3">Процесс установки Grav CMS производился на локальный веб-сервер (OpenServer). Grav является плоской файловой CMS, не требующей наличия базы данных, что упрощает её развертывание.</text:span> </text:p>
      <text:h text:style-name="P3" text:outline-level="4">Шаг 1. Установка Docker Desktop</text:h>
      <text:p text:style-name="P4">Docker позволяет изолировать окружение Grav и запустить его одной командой без настройки веб-сервера вручную.</text:p>
      <text:list text:style-name="L1">
        <text:list-item>
          <text:p text:style-name="P5">Скачан установщик с официального сайта Docker.</text:p>
        </text:list-item>
        <text:list-item>
          <text:p text:style-name="P6"><text:span text:style-name="T4">Запущена установка </text:span><text:span text:style-name="Source_20_Text"><text:span text:style-name="T4">Docker Desktop Installer.exe</text:span></text:span><text:span text:style-name="T4">.</text:span></text:p>
        </text:list-item>
        <text:list-item>
          <text:p text:style-name="P5">По завершении установки выполнена перезагрузка компьютера.</text:p>
        </text:list-item>
      </text:list>
      <text:p text:style-name="P1"><draw:frame draw:style-name="fr1" draw:name="Изображение1" text:anchor-type="char" svg:x="-0.127cm" svg:y="0.064cm" svg:width="17cm" svg:height="11.765cm" draw:z-index="0"><draw:image xlink:href="Pictures/100000010000036D0000025F6BE0A5F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Изображение2" text:anchor-type="char" svg:width="17cm" svg:height="11.737cm" draw:z-index="1"><draw:image xlink:href="Pictures/100000010000037200000261055C4A66.png" xlink:type="simple" xlink:show="embed" xlink:actuate="onLoad" draw:mime-type="image/png"/></draw:frame><text:soft-page-break/><text:s text:c="2"/></text:p>
      <text:p text:style-name="P1"/>
      <text:h text:style-name="P7" text:outline-level="4">Шаг 2. Запуск и проверка Docker</text:h>
      <text:p text:style-name="P4">После перезагрузки Docker Desktop запустился автоматически. В системном трее появилась иконка кита</text:p>
      <text:p text:style-name="P1"/>
      <text:p text:style-name="P1"/>
      <text:p text:style-name="P1"><draw:frame draw:style-name="fr1" draw:name="Изображение3" text:anchor-type="char" svg:x="0.106cm" svg:y="0.102cm" svg:width="17cm" svg:height="9.627cm" draw:z-index="2"><draw:image xlink:href="Pictures/10000001000007710000043A8CB585D9.png" xlink:type="simple" xlink:show="embed" xlink:actuate="onLoad" draw:mime-type="image/png"/></draw:frame></text:p>
      <text:h text:style-name="P7" text:outline-level="4"><text:soft-page-break/>Шаг 3. Развертывание Grav CMS</text:h>
      <text:p text:style-name="P4">Для установки Grav использовалась командная строка PowerShell (запущенная от имени администратора).</text:p>
      <text:list text:style-name="L2">
        <text:list-item>
          <text:p text:style-name="P8"><text:span text:style-name="Strong_20_Emphasis"><text:span text:style-name="T4">Скачивание образа:</text:span></text:span><text:span text:style-name="T4"><text:line-break/>Выполнена команда для загрузки официального образа Grav из реестра Docker Hub:</text:span></text:p>
          <text:p text:style-name="P9">powershell</text:p>
        </text:list-item>
        <text:list-item>
          <text:p text:style-name="P10">docker pull getgrav/grav</text:p>
        </text:list-item>
      </text:list>
      <text:p text:style-name="P1"><draw:frame draw:style-name="fr3" draw:name="Изображение4" text:anchor-type="char" svg:width="17cm" svg:height="8.707cm" draw:z-index="3"><draw:image xlink:href="Pictures/1000000100000507000004304FF0E5CD.png" xlink:type="simple" xlink:show="embed" xlink:actuate="onLoad" draw:mime-type="image/png"/></draw:frame></text:p>
      <text:p text:style-name="P11"><text:span text:style-name="Strong_20_Emphasis"><text:span text:style-name="T4">Создание контейнера:</text:span></text:span><text:span text:style-name="T4"><text:line-break/>Запущен контейнер с пробросом порта 8080 локальной машины на 80 порт контейнера:</text:span></text:p>
      <text:p text:style-name="P4">powershell</text:p>
      <text:p text:style-name="P12">docker run -d -p 8080:80 --name grav-site getgrav/grav</text:p>
      <text:p text:style-name="P1"/>
      <text:p text:style-name="P13"><text:span text:style-name="Strong_20_Emphasis"><text:span text:style-name="T4">Проверка статуса контейнера:</text:span></text:span><text:span text:style-name="T4"><text:line-break/>Убедиться, что контейнер успешно запущен, можно командой </text:span><text:span text:style-name="Source_20_Text"><text:span text:style-name="T4">docker ps</text:span></text:span><text:span text:style-name="T4">.</text:span></text:p>
      <text:p text:style-name="P1"/>
      <text:p text:style-name="P1"/>
      <text:p text:style-name="P1"><draw:frame draw:style-name="fr3" draw:name="Изображение10" text:anchor-type="char" svg:width="17cm" svg:height="5.525cm" draw:z-index="8"><draw:image xlink:href="Pictures/10000001000005D1000001E406C283BB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4"><draw:frame draw:style-name="fr2" draw:name="Изображение5" text:anchor-type="char" svg:width="17cm" svg:height="8.557cm" draw:z-index="4"><draw:image xlink:href="Pictures/10000001000006AA000004E12497B76A.png" xlink:type="simple" xlink:show="embed" xlink:actuate="onLoad" draw:mime-type="image/png"/></draw:frame><text:s/>Шаг 4. Доступ к сайту и админ-панели</text:p>
      <text:list text:style-name="L3">
        <text:list-item>
          <text:p text:style-name="P15"><text:span text:style-name="Strong_20_Emphasis"><text:span text:style-name="T4">Сайт:</text:span></text:span><text:span text:style-name="T4"> Grav стал доступен по адресу </text:span><text:span text:style-name="Source_20_Text"><text:span text:style-name="T4">http://localhost:8080</text:span></text:span><text:span text:style-name="T4">.</text:span></text:p>
          <text:p text:style-name="P16"><draw:frame draw:style-name="fr4" draw:name="Изображение9" text:anchor-type="char" svg:width="14.249cm" svg:height="7.609cm" draw:z-index="7"><draw:image xlink:href="Pictures/1000000100000F000000083E47E4369F.png" xlink:type="simple" xlink:show="embed" xlink:actuate="onLoad" draw:mime-type="image/png"/></draw:frame><text:span text:style-name="Emphasis"><text:span text:style-name="T4"/></text:span></text:p>
        </text:list-item>
        <text:list-item>
          <text:p text:style-name="P15"><text:span text:style-name="Strong_20_Emphasis"><text:span text:style-name="T4">Админ-панель:</text:span></text:span><text:span text:style-name="T4"> Для управления контентом необходимо установить Admin-плагин. Выполнена команда внутри контейнера:</text:span></text:p>
          <text:p text:style-name="P17">powershell</text:p>
          <text:p text:style-name="P18">docker exec -it grav-site bin/gpm install admin</text:p>
          <text:p text:style-name="P15"><text:span text:style-name="T4">После установки админ-панель доступна по адресу </text:span><text:span text:style-name="Source_20_Text"><text:span text:style-name="T4">http://localhost:8080/admin</text:span></text:span></text:p>
        </text:list-item>
      </text:list>
      <text:p text:style-name="P14">Выбор тем и настройка страниц:</text:p>
      <text:p text:style-name="P1"><draw:frame draw:style-name="fr2" draw:name="Изображение6" text:anchor-type="char" svg:width="17cm" svg:height="9.105cm" draw:z-index="5"><draw:image xlink:href="Pictures/1000000100000F00000007C16D909F0B.png" xlink:type="simple" xlink:show="embed" xlink:actuate="onLoad" draw:mime-type="image/png"/></draw:frame><text:soft-page-break/></text:p>
      <text:p text:style-name="P1"/>
      <text:p text:style-name="P1"/>
      <text:p text:style-name="P1"><text:span text:style-name="T2">Тема 1</text:span>: <text:s/>Тема более всего похожая на альтернативный дизайн сайта кафедры. Мне показалось</text:p>
      <text:p text:style-name="P19"><text:span text:style-name="T5">что тема «</text:span><text:span text:style-name="T6">Editorial</text:span><text:span text:style-name="T5">» (</text:span><text:a xlink:type="simple" xlink:href="https://github.com/pmoreno-rodriguez/grav-theme-editorial" office:target-frame-name="_blank" xlink:show="new" text:style-name="Internet_20_link" text:visited-style-name="Visited_20_Internet_20_Link"><text:span text:style-name="T4">https://github.com/pmoreno-rodriguez/grav-theme-editorial</text:span></text:a><text:span text:style-name="T4"> </text:span><text:span text:style-name="T5">) больше всего подойдет для этого.</text:span></text:p>
      <text:p text:style-name="P1"><draw:frame draw:style-name="fr1" draw:name="Изображение7" text:anchor-type="char" svg:x="-0.318cm" svg:y="0.466cm" svg:width="17cm" svg:height="9.13cm" draw:z-index="6"><draw:image xlink:href="Pictures/10000000000006000000040083B435E8.png" xlink:type="simple" xlink:show="embed" xlink:actuate="onLoad" draw:mime-type="image/png"/></draw:frame></text:p>
      <text:p text:style-name="P1"/>
      <text:p text:style-name="P1">Схожий конструктив страниц ( Меню слева — основная информация справа) .</text:p>
      <text:p text:style-name="P14"/>
      <text:p text:style-name="P14"/>
      <text:p text:style-name="P14"/>
      <text:p text:style-name="P1"><text:soft-page-break/>В ходе работы были исследованы возможности CMS Grav по кастомизации пользовательских тем оформления. Были подобраны и адаптированы две различные темы: современная минималистичная тема, ориентированная на альтернативный дизайн в Figma, и классическая академическая тема, соответствующая структуре сайтов образовательных учреждений. </text:p>
      <text:p text:style-name="P1"><draw:frame draw:style-name="fr5" draw:name="Изображение8" text:anchor-type="char" svg:width="12.781cm" svg:height="12.887cm" draw:z-index="9"><draw:image xlink:href="Pictures/100000010000012400000121D28E140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9T11:18:47.280591400</meta:creation-date>
    <dc:date>2026-05-12T15:52:08.204063400</dc:date>
    <meta:editing-duration>PT34M58S</meta:editing-duration>
    <meta:editing-cycles>8</meta:editing-cycles>
    <meta:generator>LibreOffice/26.2.1.2$Windows_X86_64 LibreOffice_project/620$Build-2</meta:generator>
    <meta:document-statistic meta:table-count="0" meta:image-count="10" meta:object-count="0" meta:page-count="6" meta:paragraph-count="30" meta:word-count="277" meta:character-count="2169" meta:non-whitespace-character-count="1921"/>
  </office:meta>
</office:document-meta>
</file>