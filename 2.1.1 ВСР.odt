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2400000121D28E140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modern" style:font-pitch="fixed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b15f6" officeooo:paragraph-rsid="0006817d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 style:list-style-name="WWNum1"/>
    <style:style style:name="P4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 style:list-style-name="WWNum2">
      <style:text-properties style:font-name="Times New Roman" fo:font-size="12pt" style:font-size-asian="12pt" style:font-size-complex="12pt"/>
    </style:style>
    <style:style style:name="P6" style:family="paragraph" style:parent-style-name="Standard" style:list-style-name="WWNum2"/>
    <style:style style:name="P7" style:family="paragraph" style:parent-style-name="Standard" style:list-style-name="WWNum3"/>
    <style:style style:name="P8" style:family="paragraph" style:parent-style-name="Standard" style:list-style-name="WWNum3">
      <style:text-properties style:font-name="Times New Roman" fo:font-size="12pt" style:font-size-asian="12pt" style:font-size-complex="12pt"/>
    </style:style>
    <style:style style:name="P9" style:family="paragraph" style:parent-style-name="Standard" style:list-style-name="WWNum3">
      <style:text-properties officeooo:paragraph-rsid="00087d7c"/>
    </style:style>
    <style:style style:name="P10" style:family="paragraph" style:parent-style-name="Text_20_body">
      <style:paragraph-properties fo:margin-top="0cm" fo:margin-bottom="0.282cm" style:contextual-spacing="false" fo:line-height="116%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 style:list-style-name="WWNum4"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 style:list-style-name="WWNum5">
      <style:text-properties style:font-name="Times New Roman" fo:font-size="12pt" style:font-size-asian="12pt" style:font-size-complex="12pt"/>
    </style:style>
    <style:style style:name="P13" style:family="paragraph" style:parent-style-name="Standard" style:list-style-name="WWNum6"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Standard" style:list-style-name="WWNum6">
      <style:text-properties style:font-name="Times New Roman" fo:font-size="12pt" style:font-size-asian="12pt" style:font-size-complex="12pt"/>
    </style:style>
    <style:style style:name="P15" style:family="paragraph" style:parent-style-name="Standard" style:list-style-name="WWNum6">
      <style:text-properties style:font-name="Times New Roman" fo:font-size="12pt" officeooo:paragraph-rsid="0008b95a" style:font-size-asian="12pt" style:font-size-complex="12pt"/>
    </style:style>
    <style:style style:name="P16" style:family="paragraph" style:parent-style-name="Standard" style:list-style-name="WWNum7"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Standard" style:list-style-name="WWNum7">
      <style:text-properties style:font-name="Times New Roman" fo:font-size="12pt" style:font-size-asian="12pt" style:font-size-complex="12pt"/>
    </style:style>
    <style:style style:name="P18" style:family="paragraph" style:parent-style-name="Standard" style:list-style-name="WWNum8">
      <style:text-properties style:font-name="Times New Roman" fo:font-size="12pt" style:font-size-asian="12pt" style:font-size-complex="12pt"/>
    </style:style>
    <style:style style:name="P19" style:family="paragraph" style:parent-style-name="Standard" style:list-style-name="WWNum9">
      <style:text-properties style:font-name="Times New Roman" fo:font-size="12pt" style:font-size-asian="12pt" style:font-size-complex="12pt"/>
    </style:style>
    <style:style style:name="P20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1" style:family="paragraph" style:parent-style-name="Standard">
      <style:paragraph-properties fo:margin-top="0cm" fo:margin-bottom="0.282cm" style:contextual-spacing="false" fo:break-before="page"/>
    </style:style>
    <style:style style:name="P22" style:family="paragraph" style:parent-style-name="Standard">
      <loext:graphic-properties draw:fill="solid" draw:fill-color="#000000"/>
      <style:paragraph-properties fo:margin-top="0cm" fo:margin-bottom="0cm" style:contextual-spacing="false" style:line-height-at-least="0.582cm" fo:background-color="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10pt" style:font-size-asian="10pt" style:font-size-complex="10pt"/>
    </style:style>
    <style:style style:name="P23" style:family="paragraph" style:parent-style-name="Standard">
      <loext:graphic-properties draw:fill="solid" draw:fill-color="#000000"/>
      <style:paragraph-properties fo:margin-top="0cm" fo:margin-bottom="0cm" style:contextual-spacing="false" style:line-height-at-least="0.582cm" fo:background-color="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9fafb" loext:opacity="100%" style:font-name="Consolas" fo:font-size="10pt" style:letter-kerning="false" style:font-name-asian="Times New Roman1" style:font-size-asian="10pt" style:language-asian="ru" style:country-asian="RU" style:font-name-complex="Courier New" style:font-size-complex="10pt"/>
    </style:style>
    <style:style style:name="P24" style:family="paragraph" style:parent-style-name="Standard">
      <loext:graphic-properties draw:fill="solid" draw:fill-color="#000000"/>
      <style:paragraph-properties fo:margin-top="0cm" fo:margin-bottom="0cm" style:contextual-spacing="false" style:line-height-at-least="0.582cm" fo:background-color="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10pt" officeooo:paragraph-rsid="000a27f2" style:font-size-asian="10pt" style:font-size-complex="10pt"/>
    </style:style>
    <style:style style:name="P25" style:family="paragraph" style:parent-style-name="Standard">
      <loext:graphic-properties draw:fill="solid" draw:fill-color="#000000"/>
      <style:paragraph-properties fo:margin-top="0cm" fo:margin-bottom="0cm" style:contextual-spacing="false" style:line-height-at-least="0.582cm" fo:background-color="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a27f2"/>
    </style:style>
    <style:style style:name="P26" style:family="paragraph" style:parent-style-name="Standard">
      <loext:graphic-properties draw:fill="solid" draw:fill-color="#000000"/>
      <style:paragraph-properties fo:margin-top="0cm" fo:margin-bottom="0cm" style:contextual-spacing="false" style:line-height-at-least="0.582cm" fo:background-color="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ffff" loext:opacity="100%" style:font-name="Consolas" fo:font-size="10pt" style:letter-kerning="false" style:font-name-asian="Times New Roman1" style:font-size-asian="10pt" style:language-asian="ru" style:country-asian="RU" style:font-name-complex="Courier New" style:font-size-complex="10pt"/>
    </style:style>
    <style:style style:name="P27" style:family="paragraph" style:parent-style-name="Standard">
      <loext:graphic-properties draw:fill="solid" draw:fill-color="#000000"/>
      <style:paragraph-properties fo:margin-top="0cm" fo:margin-bottom="0cm" style:contextual-spacing="false" style:line-height-at-least="0.582cm" fo:background-color="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a4e10"/>
    </style:style>
    <style:style style:name="P28" style:family="paragraph" style:parent-style-name="Standard">
      <loext:graphic-properties draw:fill="solid" draw:fill-color="#000000"/>
      <style:paragraph-properties fo:margin-top="0cm" fo:margin-bottom="0cm" style:contextual-spacing="false" style:line-height-at-least="0.582cm" fo:background-color="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10pt" officeooo:paragraph-rsid="000a4e10" style:font-size-asian="10pt" style:font-size-complex="10pt"/>
    </style:style>
    <style:style style:name="P29" style:family="paragraph" style:parent-style-name="Standard">
      <loext:graphic-properties draw:fill="solid" draw:fill-color="#000000"/>
      <style:paragraph-properties fo:margin-top="0cm" fo:margin-bottom="0cm" style:contextual-spacing="false" style:line-height-at-least="0.582cm" fo:background-color="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10pt" officeooo:paragraph-rsid="000c141e" style:font-size-asian="10pt" style:font-size-complex="10pt"/>
    </style:style>
    <style:style style:name="P30" style:family="paragraph" style:parent-style-name="Standard">
      <style:text-properties fo:color="#f9fafb" loext:opacity="100%" style:font-name="Consolas" fo:font-size="10pt" style:letter-kerning="false" style:font-name-asian="Times New Roman1" style:font-size-asian="10pt" style:language-asian="ru" style:country-asian="RU" style:font-name-complex="Courier New" style:font-size-complex="10pt"/>
    </style:style>
    <style:style style:name="P31" style:family="paragraph" style:parent-style-name="Standard">
      <style:paragraph-properties fo:margin-top="0cm" fo:margin-bottom="0.282cm" style:contextual-spacing="false" fo:text-align="center" style:justify-single-word="false" fo:break-before="page"/>
    </style:style>
    <style:style style:name="P32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style:font-name-complex="Times New Roman1"/>
    </style:style>
    <style:style style:name="T2" style:family="text">
      <style:text-properties fo:font-weight="bold" style:font-weight-asian="bold" style:font-name-complex="Times New Roman1" style:font-weight-complex="bold"/>
    </style:style>
    <style:style style:name="T3" style:family="text">
      <style:text-properties fo:font-variant="normal" fo:text-transform="none" fo:color="#333333" loext:opacity="100%" style:font-name="Times New Roman" fo:font-size="12pt" fo:letter-spacing="normal" fo:font-style="normal" style:text-underline-style="solid" style:text-underline-width="auto" style:text-underline-color="font-color" fo:font-weight="normal" style:font-size-asian="12pt" style:font-weight-asian="normal" style:font-name-complex="Times New Roman1" style:font-size-complex="12pt" style:font-weight-complex="normal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fo:font-variant="normal" fo:text-transform="none" fo:color="#0f1115" loext:opacity="100%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f1115" loext:opacity="100%" style:font-name="Times New Roman" fo:font-size="12pt" fo:letter-spacing="normal" style:font-size-asian="12pt" style:font-size-complex="12pt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fo:font-variant="normal" fo:text-transform="none" fo:color="#333333" loext:opacity="100%" style:font-name="Times New Roman" fo:font-size="12pt" fo:letter-spacing="normal" fo:font-style="normal" style:text-underline-style="solid" style:text-underline-width="auto" style:text-underline-color="font-color" fo:font-weight="normal" style:font-size-asian="12pt" style:font-name-complex="Times New Roman1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10" style:family="text">
      <style:text-properties style:text-underline-style="solid" style:text-underline-width="auto" style:text-underline-color="font-color" style:font-name-complex="Times New Roman1"/>
    </style:style>
    <style:style style:name="T11" style:family="text">
      <style:text-properties fo:font-variant="normal" fo:text-transform="none" fo:color="#333333" loext:opacity="100%" fo:letter-spacing="normal" fo:font-style="normal" style:text-underline-style="solid" style:text-underline-width="auto" style:text-underline-color="font-color" fo:font-weight="normal" style:font-name-complex="Times New Roman1"/>
    </style:style>
    <style:style style:name="T12" style:family="text">
      <style:text-properties fo:font-variant="normal" fo:text-transform="none" fo:color="#0f1115" loext:opacity="100%" fo:letter-spacing="normal" fo:font-style="normal" fo:font-weight="normal"/>
    </style:style>
    <style:style style:name="T13" style:family="text">
      <style:text-properties fo:font-variant="normal" fo:text-transform="none" fo:color="#0f1115" loext:opacity="100%" style:font-name="Times New Roman" fo:font-size="12pt" fo:letter-spacing="normal" fo:font-style="normal" fo:font-weight="normal" style:font-size-asian="12pt" style:font-name-complex="Times New Roman1" style:font-size-complex="12pt"/>
    </style:style>
    <style:style style:name="T14" style:family="text">
      <style:text-properties fo:font-variant="normal" fo:text-transform="none" fo:color="#0f1115" loext:opacity="100%" style:font-name="Times New Roman" fo:font-size="12pt" fo:letter-spacing="normal" fo:font-style="normal" fo:font-weight="normal" style:font-size-asian="12pt" style:font-weight-asian="normal" style:font-name-complex="Times New Roman1" style:font-size-complex="12pt" style:font-weight-complex="normal"/>
    </style:style>
    <style:style style:name="T15" style:family="text">
      <style:text-properties fo:font-variant="normal" fo:text-transform="none" fo:color="#333333" loext:opacity="100%" fo:letter-spacing="normal" fo:font-style="normal" style:text-underline-style="solid" style:text-underline-width="auto" style:text-underline-color="font-color" fo:font-weight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variant="normal" fo:text-transform="none" fo:color="#000000" loext:opacity="100%" fo:letter-spacing="normal" fo:font-style="normal" fo:font-weight="normal"/>
    </style:style>
    <style:style style:name="T18" style:family="text">
      <style:text-properties fo:color="#000000" loext:opacity="100%"/>
    </style:style>
    <style:style style:name="T19" style:family="text">
      <style:text-properties style:text-underline-style="none" style:font-name-complex="Times New Roman1"/>
    </style:style>
    <style:style style:name="T20" style:family="text">
      <style:text-properties style:font-name="Times New Roman" style:font-name-complex="Times New Roman1"/>
    </style:style>
    <style:style style:name="T21" style:family="text">
      <style:text-properties fo:color="#e3eaf2" loext:opacity="100%" fo:font-weight="bold" style:letter-kerning="false" style:font-name-asian="Times New Roman1" style:language-asian="ru" style:country-asian="RU" style:font-weight-asian="bold" style:font-name-complex="Courier New" style:font-weight-complex="bold"/>
    </style:style>
    <style:style style:name="T22" style:family="text">
      <style:text-properties fo:color="#cd6660" loext:opacity="100%" fo:font-weight="bold" style:letter-kerning="false" style:font-name-asian="Times New Roman1" style:language-asian="ru" style:country-asian="RU" style:font-weight-asian="bold" style:font-name-complex="Courier New" style:font-weight-complex="bold"/>
    </style:style>
    <style:style style:name="T23" style:family="text">
      <style:text-properties fo:color="#e3eaf2" loext:opacity="100%" style:letter-kerning="false" style:font-name-asian="Times New Roman1" style:language-asian="ru" style:country-asian="RU" style:font-name-complex="Courier New"/>
    </style:style>
    <style:style style:name="T24" style:family="text">
      <style:text-properties fo:color="#f9fafb" loext:opacity="100%" style:letter-kerning="false" style:font-name-asian="Times New Roman1" style:language-asian="ru" style:country-asian="RU" style:font-name-complex="Courier New"/>
    </style:style>
    <style:style style:name="T25" style:family="text">
      <style:text-properties fo:font-variant="normal" fo:text-transform="none" fo:color="#ffffff" loext:opacity="100%" fo:letter-spacing="normal" fo:font-style="normal" style:text-underline-style="none" fo:font-weight="bold" style:letter-kerning="false" style:font-name-asian="Times New Roman1" style:language-asian="ru" style:country-asian="RU" style:font-weight-asian="bold" style:font-name-complex="Times New Roman1" style:font-weight-complex="bold"/>
    </style:style>
    <style:style style:name="T26" style:family="text">
      <style:text-properties fo:color="#f9fafb" loext:opacity="100%" style:font-name="Consolas" fo:font-size="10pt" style:letter-kerning="false" style:font-name-asian="Times New Roman1" style:font-size-asian="10pt" style:language-asian="ru" style:country-asian="RU" style:font-name-complex="Courier New" style:font-size-complex="10pt"/>
    </style:style>
    <style:style style:name="T27" style:family="text">
      <style:text-properties fo:color="#e3eaf2" loext:opacity="100%" style:font-name="Consolas" fo:font-size="10pt" style:letter-kerning="false" style:font-name-asian="Times New Roman1" style:font-size-asian="10pt" style:language-asian="ru" style:country-asian="RU" style:font-name-complex="Courier New" style:font-size-complex="10pt"/>
    </style:style>
    <style:style style:name="T28" style:family="text">
      <style:text-properties fo:color="#e3eaf2" loext:opacity="100%" style:font-name="Consolas" fo:font-size="10pt" fo:font-style="italic" style:letter-kerning="false" style:font-name-asian="Times New Roman1" style:font-size-asian="10pt" style:language-asian="ru" style:country-asian="RU" style:font-style-asian="italic" style:font-name-complex="Courier New" style:font-size-complex="10pt" style:font-style-complex="italic"/>
    </style:style>
    <style:style style:name="T29" style:family="text">
      <style:text-properties fo:color="#f9fafb" loext:opacity="100%" style:font-name="Consolas" fo:font-size="10pt" fo:font-style="italic" style:letter-kerning="false" style:font-name-asian="Times New Roman1" style:font-size-asian="10pt" style:language-asian="ru" style:country-asian="RU" style:font-style-asian="italic" style:font-name-complex="Courier New" style:font-size-complex="10pt" style:font-style-complex="italic"/>
    </style:style>
    <style:style style:name="T30" style:family="text">
      <style:text-properties fo:font-variant="normal" fo:text-transform="none" fo:color="#ffffff" loext:opacity="100%" style:font-name="Consolas" fo:font-size="10pt" fo:letter-spacing="normal" fo:font-style="normal" fo:font-weight="normal" style:letter-kerning="false" style:font-name-asian="Times New Roman1" style:font-size-asian="10pt" style:language-asian="ru" style:country-asian="RU" style:font-name-complex="Courier New" style:font-size-complex="10pt"/>
    </style:style>
    <style:style style:name="T31" style:family="text">
      <style:text-properties fo:font-variant="normal" fo:text-transform="none" fo:color="#ffffff" loext:opacity="100%" style:font-name="Consolas" fo:font-size="10pt" fo:letter-spacing="normal" style:letter-kerning="false" style:font-name-asian="Times New Roman1" style:font-size-asian="10pt" style:language-asian="ru" style:country-asian="RU" style:font-name-complex="Courier New" style:font-size-complex="10pt"/>
    </style:style>
    <style:style style:name="T32" style:family="text">
      <style:text-properties fo:color="#ffffff" loext:opacity="100%" style:font-name="Consolas" fo:font-size="10pt" style:letter-kerning="false" style:font-name-asian="Times New Roman1" style:font-size-asian="10pt" style:language-asian="ru" style:country-asian="RU" style:font-name-complex="Courier New" style:font-size-complex="10pt"/>
    </style:style>
    <style:style style:name="T33" style:family="text">
      <style:text-properties fo:color="#ffffff" loext:opacity="100%" style:text-underline-style="none" fo:font-weight="bold" style:letter-kerning="false" style:font-name-asian="Times New Roman1" style:language-asian="ru" style:country-asian="RU" style:font-weight-asian="bold" style:font-name-complex="Times New Roman1" style:font-weight-complex="bold"/>
    </style:style>
    <style:style style:name="T34" style:family="text">
      <style:text-properties fo:color="#f9fafb" loext:opacity="100%" fo:font-weight="bold" style:letter-kerning="false" style:font-name-asian="Times New Roman1" style:language-asian="ru" style:country-asian="RU" style:font-weight-asian="bold" style:font-name-complex="Courier New" style:font-weight-complex="bold"/>
    </style:style>
    <style:style style:name="T35" style:family="text">
      <style:text-properties fo:color="#e3eaf2" loext:opacity="100%" fo:font-style="italic" style:letter-kerning="false" style:font-name-asian="Times New Roman1" style:language-asian="ru" style:country-asian="RU" style:font-style-asian="italic" style:font-name-complex="Courier New" style:font-style-complex="italic"/>
    </style:style>
    <style:style style:name="T36" style:family="text">
      <style:text-properties fo:color="#f9fafb" loext:opacity="100%" fo:font-style="italic" style:letter-kerning="false" style:font-name-asian="Times New Roman1" style:language-asian="ru" style:country-asian="RU" style:font-style-asian="italic" style:font-name-complex="Courier New" style:font-style-complex="italic"/>
    </style:style>
    <style:style style:name="T37" style:family="text">
      <style:text-properties fo:color="#f9fafb" loext:opacity="100%" style:text-underline-style="none" fo:font-weight="bold" style:letter-kerning="false" style:font-name-asian="Times New Roman1" style:language-asian="ru" style:country-asian="RU" style:font-weight-asian="bold" style:font-name-complex="Times New Roman1" style:font-weight-complex="bold"/>
    </style:style>
    <style:style style:name="T38" style:family="text">
      <style:text-properties fo:color="#f9fafb" loext:opacity="100%" style:text-underline-style="solid" style:text-underline-width="auto" style:text-underline-color="font-color" fo:font-weight="bold" style:letter-kerning="false" style:font-name-asian="Times New Roman1" style:language-asian="ru" style:country-asian="RU" style:font-weight-asian="bold" style:font-name-complex="Times New Roman1" style:font-weight-complex="bold"/>
    </style:style>
    <style:style style:name="T39" style:family="text">
      <style:text-properties fo:color="#ffffff" loext:opacity="100%" style:letter-kerning="false" style:font-name-asian="Times New Roman1" style:language-asian="ru" style:country-asian="RU" style:font-name-complex="Courier New"/>
    </style:style>
    <style:style style:name="T40" style:family="text">
      <style:text-properties fo:font-variant="normal" fo:text-transform="none" fo:color="#ffffff" loext:opacity="100%" fo:letter-spacing="normal" fo:font-style="normal" fo:font-weight="normal" style:letter-kerning="false" style:font-name-asian="Times New Roman1" style:language-asian="ru" style:country-asian="RU" style:font-name-complex="Courier New"/>
    </style:style>
    <style:style style:name="T41" style:family="text">
      <style:text-properties fo:font-variant="normal" fo:text-transform="none" fo:color="#ffffff" loext:opacity="100%" style:font-name="Consolas" fo:font-size="10pt" fo:letter-spacing="normal" fo:font-style="normal" fo:font-weight="normal" style:letter-kerning="false" style:font-name-asian="Times New Roman1" style:font-size-asian="10pt" style:language-asian="ru" style:country-asian="RU" style:font-name-complex="Times New Roman1" style:font-size-complex="10pt"/>
    </style:style>
    <style:style style:name="T42" style:family="text">
      <style:text-properties fo:font-variant="normal" fo:text-transform="none" fo:color="#ffffff" loext:opacity="100%" style:font-name="Consolas" fo:font-size="10pt" fo:letter-spacing="normal" fo:font-style="normal" fo:font-weight="normal" style:letter-kerning="false" style:font-name-asian="Times New Roman1" style:font-size-asian="10pt" style:language-asian="ru" style:country-asian="RU" style:font-weight-asian="normal" style:font-name-complex="Times New Roman1" style:font-size-complex="10pt" style:font-weight-complex="normal"/>
    </style:style>
    <style:style style:name="T43" style:family="text">
      <style:text-properties fo:font-variant="normal" fo:text-transform="none" fo:color="#ffffff" loext:opacity="100%" fo:letter-spacing="normal" fo:font-style="normal" fo:font-weight="normal" style:letter-kerning="false" style:font-name-asian="Times New Roman1" style:language-asian="ru" style:country-asian="RU" style:font-name-complex="Times New Roman1"/>
    </style:style>
    <style:style style:name="T44" style:family="text">
      <style:text-properties fo:color="#f9fafb" loext:opacity="100%" style:letter-kerning="false" style:font-name-asian="Times New Roman1" style:language-asian="ru" style:country-asian="RU" style:font-name-complex="Times New Roman1"/>
    </style:style>
    <style:style style:name="T45" style:family="text">
      <style:text-properties fo:color="#f9fafb" loext:opacity="100%" style:text-underline-style="none" style:letter-kerning="false" style:font-name-asian="Times New Roman1" style:language-asian="ru" style:country-asian="RU" style:font-name-complex="Times New Roman1"/>
    </style:style>
    <style:style style:name="T46" style:family="text">
      <style:text-properties fo:color="#cd6660" loext:opacity="100%" fo:font-weight="bold" style:letter-kerning="false" style:font-name-asian="Times New Roman1" style:language-asian="ru" style:country-asian="RU" style:font-weight-asian="bold" style:font-family-complex="Consolas" style:font-family-generic-complex="system" style:font-pitch-complex="variable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Врезка1" text:anchor-type="page" text:anchor-page-number="1" svg:x="0.37cm" svg:y="0.37cm" svg:width="0.741cm" draw:z-index="1">
        <draw:text-box fo:min-height="0.741cm">
          <text:p text:style-name="P32"/>
        </draw:text-box>
      </draw:frame>
      <draw:frame draw:style-name="fr2" draw:name="Врезка2" text:anchor-type="page" text:anchor-page-number="1" svg:x="0.37cm" svg:y="0.37cm" svg:width="0.741cm" draw:z-index="2">
        <draw:text-box fo:min-height="0.741cm">
          <text:p text:style-name="P32"/>
        </draw:text-box>
      </draw:frame>
      <draw:frame draw:style-name="fr2" draw:name="Врезка3" text:anchor-type="page" text:anchor-page-number="1" svg:x="0.37cm" svg:y="0.37cm" svg:width="0.741cm" draw:z-index="3">
        <draw:text-box fo:min-height="0.741cm">
          <text:p text:style-name="P32"/>
        </draw:text-box>
      </draw:frame>
      <draw:frame draw:style-name="fr2" draw:name="Врезка4" text:anchor-type="page" text:anchor-page-number="1" svg:x="0.37cm" svg:y="0.37cm" svg:width="0.741cm" draw:z-index="4">
        <draw:text-box fo:min-height="0.741cm">
          <text:p text:style-name="P32"/>
        </draw:text-box>
      </draw:frame>
      <text:p text:style-name="P1">Белышев Андрей Сергеевич 1зб_ИВТ(ускор.)</text:p>
      <text:p text:style-name="P2"><text:span text:style-name="T1">1</text:span><text:span text:style-name="T2">. <text:s/>Фундаментальные <text:s/>основы <text:s/>информатики</text:span></text:p>
      <text:list text:style-name="WWNum1">
        <text:list-item>
          <text:p text:style-name="P3"><text:span text:style-name="T3">Многокритериальные задачи принятия решений: теория и методы анализа : учебник для вузов / Подиновский Владислав Владимирович ; В. В. Подиновский.</text:span><text:span text:style-name="T4"><text:line-break/> <text:s text:c="7"/></text:span><text:span text:style-name="T5">Учебник </text:span><text:span text:style-name="Strong_20_Emphasis"><text:span text:style-name="T5">«Многокритериальные задачи принятия решений: теория и методы анализа»</text:span></text:span><text:span text:style-name="T6"> </text:span><text:span text:style-name="T5">Владислава Владимировича Подиновского представляет собой фундаментальное учебное издание, посвящённое математическим методам поддержки принятия решений в ситуациях, когда необходимо учитывать несколько, часто противоречивых, критериев. Книга имеет гриф Учебно-методического объединения (УМО ВО) и входит в авторитетную серию «Высшее образование» издательства «Юрайт».</text:span><text:span text:style-name="T7"> </text:span></text:p>
        </text:list-item>
        <text:list-item>
          <text:p text:style-name="P3"><text:span text:style-name="T8">Основы научных исследований в области информационных систем и технологий : учебник для вузов / Бессмертный Игорь Александрович ; И. А. Бессмертный.</text:span><text:span text:style-name="T9"> </text:span><text:span text:style-name="T4"><text:line-break/> <text:s text:c="7"/>Аннотация: <text:s/></text:span><text:span text:style-name="T5">Учебник </text:span><text:span text:style-name="Strong_20_Emphasis"><text:span text:style-name="T5">«Основы научных исследований в области информационных систем и технологий»</text:span></text:span><text:span text:style-name="T6"> </text:span><text:span text:style-name="T5">Игоря Александровича Бессмертного представляет собой практико-ориентированное учебное издание, предназначенное для магистрантов, аспирантов и преподавателей вузов, изучающих методологию и организацию научной работы. Книга имеет гриф Учебно-методического объединения (УМО ВО) и входит в серию «Высшее образование» издательства «Юрайт».</text:span><text:span text:style-name="T7"> </text:span></text:p>
        </text:list-item>
      </text:list>
      <text:p text:style-name="P4">2. <text:s/>Архитектура <text:s/>ЭВМ <text:s/>и <text:s/>операционные <text:s/>системы</text:p>
      <text:list text:style-name="WWNum2">
        <text:list-item>
          <text:p text:style-name="P5"><text:span text:style-name="T10">Таненбаум <text:s/>Э., <text:s/>Бос <text:s/>Х. <text:s/>Современные <text:s/>операционные <text:s/>системы. <text:s text:c="5"/>4 <text:s/>е <text:s/>изд. <text:s text:c="5"/>СПб.: <text:s/>Питер, <text:s/>2025.</text:span><text:span text:style-name="T1"><text:line-break/> <text:s text:c="7"/>Аннотация: <text:s/>Фундаментальный <text:s/>труд <text:s/>по <text:s/>принципам <text:s/>управления <text:s/>процессами, <text:s/>памятью, <text:s/>файловыми <text:s/>системами. <text:s/>Включены <text:s/>материалы <text:s/>по <text:s/>Android, <text:s/>виртуализации <text:s/>и <text:s/>облачным <text:s/>ОС.</text:span></text:p>
        </text:list-item>
        <text:list-item>
          <text:p text:style-name="P6"><text:span text:style-name="T8">Компьютерные науки : учебное пособие : учебное пособие. Ч. 1 / Грузина Э. Э., Корчуганова М. Р. ; Грузина Э. Э.,Корчуганова М. Р. —</text:span><text:span text:style-name="T9"><text:line-break/></text:span><text:span text:style-name="T8">Кемерово : КемГУ, 2009. </text:span><text:span text:style-name="T9"> </text:span><text:span text:style-name="T4"><text:line-break/> <text:s text:c="9"/>Аннотация: <text:s/></text:span><text:span text:style-name="T5">Учебное пособие </text:span><text:span text:style-name="Strong_20_Emphasis"><text:span text:style-name="T5">«Компьютерные науки. Часть 1»</text:span></text:span><text:span text:style-name="T5">, авторами которого являются Эльвира Эмильевна Грузина и Маргарита Рашидовна Корчуганова, представляет собой вводный курс по одноимённой дисциплине. Издание подготовлено на кафедре Кемеровского государственного университета и предназначено для студентов, обучающихся по специальности </text:span><text:span text:style-name="Strong_20_Emphasis"><text:span text:style-name="T5">«Математика»</text:span></text:span><text:span text:style-name="T7"> </text:span></text:p>
        </text:list-item>
        <text:list-item>
          <text:p text:style-name="P5"><text:span text:style-name="T10">Новожилов <text:s/>О. <text:s/>П. <text:s/>Архитектура <text:s/>ЭВМ <text:s/>и <text:s/>вычислительных <text:s/>систем. <text:s text:c="5"/>2 <text:s/>е <text:s/>изд., <text:s/>испр. <text:s/>и <text:s/>доп. <text:s text:c="5"/>М.: <text:s/>Юрайт, <text:s/>2025.</text:span><text:span text:style-name="T1"><text:line-break/> <text:s text:c="9"/>Аннотация: <text:s/>Детально <text:s/>описаны <text:s/>структура <text:s/>процессора, <text:s/>системы <text:s/>команд, <text:s/>организация <text:s/>памяти <text:s/>и <text:s/>ввода <text:s/>вывода. <text:s/>Уделяется <text:s/>внимание <text:s/>повышению <text:s/>производительности.</text:span></text:p>
        </text:list-item>
        <text:list-item>
          <text:p text:style-name="P5"><text:span text:style-name="T10">Основы <text:s/>вычислительной <text:s/>техники: <text:s/>учебник <text:s/>для <text:s/>вузов <text:s/>/ <text:s/>под <text:s/>ред. <text:s/>проф. <text:s/>Б. <text:s/>В. <text:s/>Желенкова. <text:s text:c="5"/>СПб.: <text:s/>Лань, <text:s/>2024.</text:span><text:span text:style-name="T1"><text:line-break/></text:span><text:soft-page-break/><text:span text:style-name="T1"> <text:s text:c="9"/>Аннотация: <text:s/>Излагается <text:s/>системный <text:s/>подход <text:s/>к <text:s/>синтезу <text:s/>цифровых <text:s/>автоматов, <text:s/>начиная <text:s/>с <text:s/>булевых <text:s/>функций, <text:s/>включая <text:s/>архитектуру <text:s/>микропроцессорных <text:s/>систем.</text:span></text:p>
        </text:list-item>
      </text:list>
      <text:p text:style-name="P2"><text:span text:style-name="T2">3. <text:s/>Программирование</text:span></text:p>
      <text:list text:style-name="WWNum3">
        <text:list-item>
          <text:p text:style-name="P7"><text:span text:style-name="T8">Основы алгоритмизации и программирования на языке Python : учебное пособие для вузов / Бунаков П. Ю. ; Бунаков П. Ю. - Санкт-Петербург : Лань, 2026.</text:span><text:span text:style-name="T9"> </text:span><text:span text:style-name="T4"><text:line-break/> <text:s text:c="7"/>Аннотация: <text:s/></text:span><text:span text:style-name="T5">Учебное пособие </text:span><text:span text:style-name="Strong_20_Emphasis"><text:span text:style-name="T5">«Основы алгоритмизации и программирования на языке Python»</text:span></text:span><text:span text:style-name="T6"> </text:span><text:span text:style-name="T5">Павла Юрьевича Бунакова представляет собой практико-ориентированное введение в фундаментальные основы алгоритмизации и программирования на одном из самых востребованных языков — Python.</text:span><text:span text:style-name="T7"> </text:span></text:p>
        </text:list-item>
        <text:list-item>
          <text:p text:style-name="P8"><text:span text:style-name="T11">Программирование на SQL : учебник и практикум для вузов / Маркин Александр Васильевич ; А. В. Маркин. — 3-е изд., пер. и доп. — Москва : Юрайт, 2026.</text:span><text:span text:style-name="T10"> </text:span><text:span text:style-name="T1"><text:line-break/> <text:s text:c="7"/>Аннотация: <text:s/></text:span><text:span text:style-name="T12">Учебник и практикум посвящён языку SQL — как декларативному (запросы), так и процедурному программированию (хранимые процедуры, триггеры). Рассматриваются три современные СУБД: Firebird, Microsoft SQL Server и Oracle Database. Теория сопровождается большим количеством примеров на основе учебной базы данных, приближенной к реальной. Издание включает лабораторный практикум, тесты и дополнительные онлайн-ресурсы для самостоятельной работы. Признан победителем конкурса «Золотой корифей». Соответствует ФГОС ВО. Для студентов IT-направлений и всех изучающих SQL.</text:span> </text:p>
        </text:list-item>
        <text:list-item>
          <text:p text:style-name="P7"><text:span text:style-name="T8">Информатика в 2 ч. Часть 1 : учебник для вузов / Новожилов Олег Петрович ; О. П. Новожилов. — 3-е изд., пер. и доп. — Москва : Юрайт, 2026.</text:span><text:span text:style-name="T9"> </text:span><text:span text:style-name="T4"><text:line-break/> <text:s text:c="7"/>Аннотация: <text:s/></text:span><text:span text:style-name="T5">Учебник </text:span><text:span text:style-name="Strong_20_Emphasis"><text:span text:style-name="T5">«Информатика. Часть 1»</text:span></text:span><text:span text:style-name="T6"> </text:span><text:span text:style-name="T5">Олега Петровича Новожилова представляет собой фундаментальное, переработанное и дополненное издание, предназначенное для студентов высших учебных заведений. Книга имеет гриф Учебно-методического объединения (УМО ВО) и входит в авторитетную серию «Высшее образование» издательства «Юрайт».</text:span><text:span text:style-name="T7"> </text:span></text:p>
        </text:list-item>
        <text:list-item>
          <text:p text:style-name="P9"><text:span text:style-name="T9">Федоров <text:s/>Д. <text:s/>Ю. <text:s/>Программирование <text:s/>на <text:s/>языке <text:s/>высокого <text:s/>уровня <text:s/>Python: <text:s/>учебное <text:s/>пособие. <text:s text:c="5"/>3 <text:s/>е <text:s/>изд., <text:s/>перераб. <text:s/>и <text:s/>доп. <text:s text:c="5"/>М.: <text:s/>Юрайт, <text:s/>2021.</text:span><text:span text:style-name="T4"><text:line-break/> <text:s text:c="7"/>Аннотация: <text:s/></text:span><text:span text:style-name="T13">Учебное пособие Д. Ю. Федорова </text:span><text:span text:style-name="Strong_20_Emphasis"><text:span text:style-name="T14">«Программирование на языке высокого уровня Python»</text:span></text:span><text:span text:style-name="T13"> (3-е издание, переработанное и дополненное) предназначено для студентов, изучающих основы программирования. Издание соответствует современным требованиям Федерального государственного образовательного стандарта и входит в серию «Высшее образование» издательства «Юрайт».</text:span></text:p>
        </text:list-item>
      </text:list>
      <text:p text:style-name="P10"><text:line-break/></text:p>
      <text:p text:style-name="P2"><text:span text:style-name="T1">4. <text:s/></text:span><text:span text:style-name="T2">Компьютерные <text:s/>сети <text:s/>и <text:s/>телекоммуникации</text:span></text:p>
      <text:list text:style-name="WWNum4">
        <text:list-item>
          <text:p text:style-name="P11"><text:span text:style-name="T15">Компьютерные сети и системы связи. Вводный курс : учебное пособие для вузов / Рабчевский Андрей Николаевич ; А. Н. Рабчевский. —Москва : Юрайт, 2026.</text:span><text:span text:style-name="T16"> </text:span><text:line-break/> <text:s text:c="7"/>Аннотация: <text:s/><text:span text:style-name="T17">Учебное пособие посвящено базовым понятиям, концепциям и технологиям компьютерных сетей и систем связи, включая историю коммуникаций, </text:span><text:soft-page-break/><text:span text:style-name="T17">модель OSI, способы адресации, коммутации и маршрутизации. Особое внимание уделено современным направлениям конвергенции сетей — VoIP, компьютерной телефонии и системам компьютерно-телефонной интеграции (CTI).</text:span></text:p>
        </text:list-item>
        <text:list-item>
          <text:p text:style-name="P11"><text:span text:style-name="T15">Компьютерные сети и системы связи. Вводный курс : учебное пособие для спо / Рабчевский Андрей Николаевич ; А. Н. Рабчевский. — Москва : Юрайт, 2026.</text:span><text:span text:style-name="T16"> </text:span><text:line-break/> <text:s text:c="7"/>Аннотация: <text:span text:style-name="T18"><text:s/></text:span><text:span text:style-name="T17">Курс посвящен основным понятиям и технологиям компьютерных сетей и систем связи: от истории коммуникаций и модели OSI до адресации, маршрутизации и VoIP. Особое внимание уделяется современным тенденциям конвергенции, включая компьютерную телефонию и системы CTI.</text:span></text:p>
        </text:list-item>
        <text:list-item>
          <text:p text:style-name="P11"><text:span text:style-name="T15">Архитектура ЭВМ и вычислительных систем : учебник для вузов / Новожилов Олег Петрович ; О. П. Новожилов. — 2-е изд., испр. и доп. <text:s/>Москва : Юрайт, 2026.</text:span><text:span text:style-name="T16"> </text:span><text:line-break/> <text:s text:c="7"/>Аннотация: <text:s/><text:span text:style-name="T17">В учебнике изложены принципы построения и работы устройств современных компьютеров, взаимодействие аппаратных и программных средств, а также основные тенденции развития компьютерной техники. Издание дает целостное представление о структурно-функциональной организации микропроцессоров, компьютерной памяти и вычислительных систем.</text:span></text:p>
        </text:list-item>
      </text:list>
      <text:p text:style-name="P2"><text:span text:style-name="T1">5</text:span><text:span text:style-name="T2">. <text:s/>Базы <text:s/>данных</text:span></text:p>
      <text:list text:style-name="WWNum5">
        <text:list-item>
          <text:p text:style-name="P12"><text:span text:style-name="T11">Большие данные и NoSQL базы данных : учебное пособие для вузов / Мамедли Р. Э., Казиахмедов Т. Б. ; Мамедли Р. Э.,Казиахмедов Т. Б.; Казиахмедов Т. Б. — 2-е изд., стер. — Санкт-Петербург : Лань, 2026.</text:span><text:span text:style-name="T10"> </text:span><text:span text:style-name="T1"><text:line-break/> <text:s text:c="7"/>Аннотация: <text:s/></text:span><text:span text:style-name="T12">Учебное пособие посвящено вопросам организации больших данных (Big Data) и принципам проектирования NoSQL-баз данных. В нем изложены характеристики различных систем управления базами данных (СУБД) NoSQL, даны сведения об их теории и практическом применении</text:span> </text:p>
        </text:list-item>
        <text:list-item>
          <text:p text:style-name="P12"><text:span text:style-name="T10">Кузнецов <text:s/>С. <text:s/>Д. <text:s/>Основы <text:s/>баз <text:s/>данных. <text:s text:c="5"/>2 <text:s/>е <text:s/>изд., <text:s/>испр. <text:s text:c="5"/>М.: <text:s/>ИНТУИТ, <text:s/>2023.</text:span><text:span text:style-name="T1"><text:line-break/> <text:s text:c="7"/>Аннотация: <text:s/>Учебник <text:s/>по <text:s/>архитектуре <text:s/>СУБД, <text:s/>транзакциям, <text:s/>индексации <text:s/>и <text:s/>распределённым <text:s/>базам <text:s/>данных. <text:s/>Доступен <text:s/>в <text:s/>ЭБС <text:s/>Znanium.</text:span></text:p>
        </text:list-item>
      </text:list>
      <text:p text:style-name="P2"><text:span text:style-name="T1">6. <text:s/></text:span><text:span text:style-name="T2">Искусственный <text:s/>интеллект <text:s/>и <text:s/>машинное <text:s/>обучение</text:span></text:p>
      <text:list text:style-name="WWNum6">
        <text:list-item>
          <text:p text:style-name="P13"><text:span text:style-name="T15">Анализ данных : учебник для вузов / Мхитарян Владимир Сергеевич, Архипова Марина Юрьевна, Дуброва Татьяна Абрамовна, Миронкина Юлия Николаевна, Сиротин Вячеслав Павлович ; В. С. Мхитарян [и др.] ; под редакцией В. С. Мхитаряна. Москва : Юрайт, 2026.</text:span><text:span text:style-name="T16"> </text:span><text:line-break/> <text:s text:c="7"/>Аннотация: <text:s/>Введение <text:s/>в <text:s/>современное <text:s/>машинное <text:s/>обучение: <text:s/>от <text:s/>ансамблевых <text:s/>методов <text:s/>до <text:s/>глубокого <text:s/>обучения. <text:s/>Рассматриваются <text:s/>классы <text:s/>задач <text:s/>и <text:s/>метрики <text:s/>качества.</text:p>
        </text:list-item>
        <text:list-item>
          <text:p text:style-name="P14"><text:span text:style-name="T10">Галыгина <text:s/>И. <text:s/>В. <text:s/>Основы <text:s/>искусственного <text:s/>интеллекта. <text:s/>Лабораторный <text:s/>практикум. <text:s text:c="5"/>2 <text:s/>е <text:s/>изд., <text:s/>стер. <text:s text:c="5"/>СПб.: <text:s/>Лань, <text:s/>2024.</text:span><text:span text:style-name="T1"><text:line-break/> <text:s text:c="7"/>Аннотация: <text:s/>Практикум <text:s/>по <text:s/>созданию <text:s/>систем <text:s/>ИИ <text:s/>на <text:s/>Python: <text:s/>обучение <text:s/>нейронных <text:s/>сетей, <text:s/>работа <text:s/>с <text:s/>большими <text:s/>наборами <text:s/>данных <text:s/>и <text:s/>анализ <text:s/>данных.</text:span></text:p>
        </text:list-item>
        <text:list-item>
          <text:p text:style-name="P15"><text:span text:style-name="T10">Машинное <text:s/>обучение <text:s/>и <text:s/>искусственный <text:s/>интеллект: <text:s/>учебное <text:s/>пособие <text:s/>для <text:s/>вузов. <text:s text:c="5"/>СПб.: <text:s/>Лань, <text:s/>2024.</text:span><text:span text:style-name="T1"><text:line-break/></text:span><text:soft-page-break/><text:span text:style-name="T1"> <text:s text:c="7"/>Аннотация: </text:span><text:span text:style-name="T19">Введение <text:s/>в <text:s/>современное <text:s/>машинное <text:s/>обучение: <text:s/>от <text:s/>ансамблевых <text:s/>методов <text:s/>до <text:s/>глубокого <text:s/>обучения. <text:s/>Рассматриваются <text:s/>классы <text:s/>задач <text:s/>и <text:s/>метрики <text:s/>качества.</text:span></text:p>
        </text:list-item>
      </text:list>
      <text:p text:style-name="P2"><text:span text:style-name="T1">7. <text:s/></text:span><text:span text:style-name="T2">Большие <text:s/>данные <text:s/>и <text:s/>статистика</text:span></text:p>
      <text:list text:style-name="WWNum7">
        <text:list-item>
          <text:p text:style-name="P16"><text:span text:style-name="T15">Статистическая обработка и анализ данных в гидрометеорологии / Вильфанд Р. М., Киктев Д. Б., Бакулин С. А. ; Вильфанд Р. М.,Киктев Д. Б.,Бакулин С. А. — Москва : РТУ МИРЭА, 2022.</text:span><text:span text:style-name="T16"> </text:span><text:line-break/> <text:s text:c="7"/>Аннотация: <text:s/><text:span text:style-name="T17">В пособии изложены статистические методы обработки гидрометеорологических данных: контроль качества, корреляционный и регрессионный анализ, анализ временных рядов, оценка экстремальных явлений. Предназначено для студентов гидрометеорологических специальностей и специалистов в области гидрологии и климатологии.</text:span></text:p>
        </text:list-item>
        <text:list-item>
          <text:p text:style-name="P17"><text:span text:style-name="T11">Анализ больших данных в сфере образования: методология и технологии : монография / Фиофанова О. А. ; Российский фонд фундаментальных исследований. —Москва : ДЕЛО, 2020.</text:span><text:span text:style-name="T10"> </text:span><text:span text:style-name="T1"><text:line-break/> <text:s text:c="7"/>Аннотация: <text:s/></text:span><text:span text:style-name="T12">Монография посвящена методологии и технологиям анализа больших данных в образовании: от сбора цифровых следов студентов до прогнозирования успеваемости и персонализации обучения.</text:span> </text:p>
        </text:list-item>
      </text:list>
      <text:p text:style-name="P4">8. <text:s/>Компьютерная <text:s/>графика <text:s/>и <text:s/>моделирование</text:p>
      <text:list text:style-name="WWNum8">
        <text:list-item>
          <text:p text:style-name="P18"><text:span text:style-name="T10">Боресков <text:s/>А. <text:s/>В., <text:s/>Шикин <text:s/>Е. <text:s/>В. <text:s/>Основы <text:s/>компьютерной <text:s/>графики. <text:s text:c="5"/>2 <text:s/>е <text:s/>изд. <text:s text:c="5"/>М.: <text:s/>Юрайт, <text:s/>2023.</text:span><text:span text:style-name="T1"><text:line-break/> <text:s text:c="7"/>Аннотация: <text:s/>Базовые <text:s/>алгоритмы, <text:s/>методы <text:s/>и <text:s/>модели <text:s/>компьютерной <text:s/>графики.</text:span></text:p>
        </text:list-item>
        <text:list-item>
          <text:p text:style-name="P18"><text:span text:style-name="T10">Математическое <text:s/>и <text:s/>компьютерное <text:s/>моделирование: <text:s/>учебное <text:s/>пособие <text:s/>для <text:s/>вузов <text:s/>/ <text:s/>Бугров <text:s/>А. <text:s text:c="5"/>М.: <text:s/>Юрайт, <text:s/>2025.</text:span><text:span text:style-name="T1"><text:line-break/> <text:s text:c="7"/>Аннотация: <text:s/>Методы <text:s/>создания <text:s/>аналитических <text:s/>и <text:s/>численных <text:s/>моделей, <text:s/>основы <text:s/>метода <text:s/>статистических <text:s/>испытаний <text:s/>(Монте <text:s/>Карло).</text:span></text:p>
        </text:list-item>
      </text:list>
      <text:p text:style-name="P4">9. <text:s/>Проектная <text:s/>деятельность <text:s/>и <text:s/>технологии <text:s/>разработки <text:s/>ПО</text:p>
      <text:list text:style-name="WWNum9">
        <text:list-item>
          <text:p text:style-name="P19"><text:span text:style-name="T10">Кислицын <text:s/>Е. <text:s/>В., <text:s/>Панов <text:s/>М. <text:s/>А. <text:s/>Современные <text:s/>технологии <text:s/>разработки <text:s/>программного <text:s/>обеспечения. <text:s text:c="5"/>Екатеринбург: <text:s/>УрГЭУ, <text:s/>2021.</text:span><text:span text:style-name="T1"><text:line-break/> <text:s text:c="7"/>Аннотация: <text:s/>Методологии <text:s/>Agile <text:s/>и <text:s/>Scrum, <text:s/>инструменты <text:s/>Git, <text:s/>концепция <text:s/>непрерывной <text:s/>интеграции <text:s/>CI/CD.</text:span></text:p>
        </text:list-item>
        <text:list-item>
          <text:p text:style-name="P19"><text:span text:style-name="T10">Трусов <text:s/>А. <text:s/>В. <text:s/>Технология <text:s/>проектирования <text:s/>информационных <text:s/>систем. <text:s text:c="5"/>Вологда: <text:s/>Инфра <text:s/>Инженерия, <text:s/>2023.</text:span><text:span text:style-name="T1"><text:line-break/> <text:s text:c="7"/>Аннотация: <text:s/>Этапы <text:s/>проектирования <text:s/>ИС, <text:s/>методы <text:s/>стандартизации, <text:s/>оформление <text:s/>проектной <text:s/>документации. <text:s/>Доступно <text:s/>в <text:s/>ЭБС <text:s/>IPR <text:s/>SMART.</text:span></text:p>
        </text:list-item>
      </text:list>
      <text:p text:style-name="P20"/>
      <text:p text:style-name="P21" loext:marker-style-name="T20"><text:span text:style-name="T20">Вариант <text:s/>для <text:s/>сайта <text:s/>кафедры <text:s/>(Markdown)</text:span><text:span text:style-name="T20"/></text:p>
      <text:p text:style-name="Standard" loext:marker-style-name="T20"><text:span text:style-name="T20">Ниже <text:s/>представлен <text:s/>тот <text:s/>же <text:s/>самый <text:s/>список <text:s/>изданий, <text:s/>но <text:s/>оформленный <text:s/>в <text:s/>виде <text:s/>Markdown-разметки, <text:s/>готовой <text:s/>для <text:s/>копирования <text:s/>на <text:s/>сайт.</text:span><text:span text:style-name="T20"/></text:p>
      <text:p text:style-name="P22"><text:span text:style-name="T21">##</text:span><text:span text:style-name="T22"> <text:s/>Актуальная <text:s/>электронная <text:s/>библиотека <text:s/>для <text:s/>направления <text:s/>09.03.01 <text:s/>«Информатика <text:s/>и <text:s/>вычислительная <text:s/>техника»</text:span></text:p>
      <text:p text:style-name="P23"/>
      <text:p text:style-name="P22"><text:span text:style-name="T21">###</text:span><text:span text:style-name="T22"> <text:s text:c="3"/>1. <text:s/>Фундаментальные <text:s/>основы <text:s/>информатики</text:span></text:p>
      <text:p text:style-name="P23"/>
      <text:p text:style-name="P24"><text:span text:style-name="T23">-</text:span><text:span text:style-name="T24"> <text:s/></text:span><text:span text:style-name="T21">**</text:span><text:span text:style-name="T25">Многокритериальные задачи принятия решений: теория и методы анализа : учебник для вузов / Подиновский Владислав Владимирович ; В. В. Подиновский.</text:span></text:p>
      <text:p text:style-name="P25"><text:span text:style-name="T26"><text:s text:c="4"/></text:span><text:span text:style-name="T27">-</text:span><text:span text:style-name="T26"> <text:s/></text:span><text:span text:style-name="T28">*</text:span><text:span text:style-name="T29">Аннотация:</text:span><text:span text:style-name="T28">*</text:span><text:span text:style-name="T29"> <text:s/></text:span><text:span text:style-name="T30">Учебник </text:span><text:span text:style-name="Strong_20_Emphasis"><text:span text:style-name="T30">«Многокритериальные задачи принятия решений: теория и методы анализа»</text:span></text:span><text:span text:style-name="T31"> </text:span><text:span text:style-name="T30">Владислава Владимировича Подиновского представляет собой фундаментальное учебное издание, посвящённое математическим методам поддержки принятия решений в ситуациях, когда необходимо учитывать несколько, часто противоречивых, критериев. Книга имеет гриф Учебно-методического объединения (УМО ВО) и входит в авторитетную серию «Высшее образование» издательства «Юрайт».</text:span><text:span text:style-name="T32"> </text:span></text:p>
      <text:p text:style-name="P26"/>
      <text:p text:style-name="P24"><text:span text:style-name="T23">-</text:span><text:span text:style-name="T24"> <text:s/></text:span><text:span text:style-name="T21">**</text:span><text:span text:style-name="T25">Основы научных исследований в области информационных систем и технологий : учебник для вузов / Бессмертный Игорь Александрович ; И. А. Бессмертный.</text:span><text:span text:style-name="T33"> </text:span></text:p>
      <text:p text:style-name="P25"><text:span text:style-name="T26"><text:s text:c="4"/></text:span><text:span text:style-name="T27">-</text:span><text:span text:style-name="T26"> <text:s/></text:span><text:span text:style-name="T28">*</text:span><text:span text:style-name="T29">Аннотация:</text:span><text:span text:style-name="T28">*</text:span><text:span text:style-name="T26"> </text:span><text:span text:style-name="T32"><text:s/></text:span><text:span text:style-name="T30">Учебник </text:span><text:span text:style-name="Strong_20_Emphasis"><text:span text:style-name="T30">«Основы научных исследований в области информационных систем и технологий»</text:span></text:span><text:span text:style-name="T31"> </text:span><text:span text:style-name="T30">Игоря Александровича Бессмертного представляет собой практико-ориентированное учебное издание, предназначенное для магистрантов, аспирантов и преподавателей вузов, изучающих методологию и организацию научной работы. Книга имеет гриф Учебно-методического объединения (УМО ВО) и входит в серию «Высшее образование» издательства «Юрайт».</text:span><text:span text:style-name="T32"> </text:span></text:p>
      <text:p text:style-name="P23"/>
      <text:p text:style-name="P22"><text:span text:style-name="T21">###</text:span><text:span text:style-name="T22"> <text:s text:c="3"/>2. <text:s/>Архитектура <text:s/>ЭВМ <text:s/>и <text:s/>операционные <text:s/>системы</text:span></text:p>
      <text:p text:style-name="P23"/>
      <text:p text:style-name="P22"><text:span text:style-name="T23">-</text:span><text:span text:style-name="T24"> <text:s/></text:span><text:span text:style-name="T21">**</text:span><text:span text:style-name="T34">Таненбаум <text:s/>Э., <text:s/>Бос <text:s/>Х. <text:s/>Современные <text:s/>операционные <text:s/>системы.</text:span><text:span text:style-name="T21">**</text:span><text:span text:style-name="T34"> <text:s/>— <text:s/>4-е <text:s/>изд. <text:s/>— <text:s/>СПб.: <text:s/>Питер, <text:s/>2025.</text:span></text:p>
      <text:p text:style-name="P22"><text:span text:style-name="T24"><text:s text:c="4"/></text:span><text:span text:style-name="T23">-</text:span><text:span text:style-name="T24"> <text:s/></text:span><text:span text:style-name="T35">*</text:span><text:span text:style-name="T36">Аннотация:</text:span><text:span text:style-name="T35">*</text:span><text:span text:style-name="T24"> <text:s/>Фундаментальный <text:s/>труд <text:s/>по <text:s/>принципам <text:s/>управления <text:s/>процессами, <text:s/>памятью, <text:s/>файловыми <text:s/>системами. <text:s/>Включены <text:s/>материалы <text:s/>по <text:s/>Android, <text:s/>виртуализации <text:s/>и <text:s/>облачным <text:s/>ОС.</text:span></text:p>
      <text:p text:style-name="P23"/>
      <text:p text:style-name="P24"><text:span text:style-name="T23">-</text:span><text:span text:style-name="T24"> <text:s/></text:span><text:span text:style-name="T21">**</text:span><text:span text:style-name="T25">Компьютерные науки : учебное пособие : учебное пособие. Ч. 1 / Грузина Э. Э., Корчуганова М. Р. ; Грузина Э. Э.,Корчуганова М. Р. —</text:span><text:span text:style-name="T33"><text:line-break/></text:span><text:span text:style-name="T25">Кемерово : КемГУ, 2009. </text:span><text:span text:style-name="T37"> </text:span></text:p>
      <text:p text:style-name="P25"><text:span text:style-name="T26"><text:s text:c="4"/></text:span><text:span text:style-name="T27">-</text:span><text:span text:style-name="T26"> <text:s/></text:span><text:span text:style-name="T28">*</text:span><text:span text:style-name="T29">Аннотация:</text:span><text:span text:style-name="T28">*</text:span><text:span text:style-name="T26"> <text:s/></text:span><text:span text:style-name="T30">Учебное пособие </text:span><text:span text:style-name="Strong_20_Emphasis"><text:span text:style-name="T30">«Компьютерные науки. Часть 1»</text:span></text:span><text:span text:style-name="T30">, авторами которого являются Эльвира Эмильевна Грузина и Маргарита Рашидовна Корчуганова, представляет собой вводный курс по одноимённой дисциплине. Издание подготовлено на кафедре Кемеровского государственного университета и предназначено для студентов, обучающихся по специальности </text:span><text:span text:style-name="Strong_20_Emphasis"><text:span text:style-name="T30">«Математика»</text:span></text:span><text:span text:style-name="T32"> </text:span></text:p>
      <text:p text:style-name="P23"/>
      <text:p text:style-name="P22"><text:soft-page-break/><text:span text:style-name="T23">-</text:span><text:span text:style-name="T24"> <text:s/></text:span><text:span text:style-name="T21">**</text:span><text:span text:style-name="T34">Новожилов <text:s/>О. <text:s/>П. <text:s/>Архитектура <text:s/>ЭВМ <text:s/>и <text:s/>вычислительных <text:s/>систем.</text:span><text:span text:style-name="T21">**</text:span><text:span text:style-name="T34"> <text:s/>— <text:s/>2-е <text:s/>изд., <text:s/>испр. <text:s/>и <text:s/>доп. <text:s/>— <text:s/>М.: <text:s/>Юрайт, <text:s/>2025.</text:span></text:p>
      <text:p text:style-name="P22"><text:span text:style-name="T24"><text:s text:c="4"/></text:span><text:span text:style-name="T23">-</text:span><text:span text:style-name="T24"> <text:s/></text:span><text:span text:style-name="T35">*</text:span><text:span text:style-name="T36">Аннотация:</text:span><text:span text:style-name="T35">*</text:span><text:span text:style-name="T24"> <text:s/>Детально <text:s/>описаны <text:s/>структура <text:s/>процессора, <text:s/>системы <text:s/>команд, <text:s/>организация <text:s/>памяти <text:s/>и <text:s/>ввода-вывода.</text:span></text:p>
      <text:p text:style-name="P23"/>
      <text:p text:style-name="P22"><text:span text:style-name="T23">-</text:span><text:span text:style-name="T24"> <text:s/></text:span><text:span text:style-name="T21">**</text:span><text:span text:style-name="T34">Основы <text:s/>вычислительной <text:s/>техники: <text:s/>учебник <text:s/>для <text:s/>вузов</text:span><text:span text:style-name="T21">**</text:span><text:span text:style-name="T34"> <text:s/>/ <text:s/>под <text:s/>ред. <text:s/>проф. <text:s/>Б. <text:s/>В. <text:s/>Желенкова. <text:s/>— <text:s/>СПб.: <text:s/>Лань, <text:s/>2024.</text:span></text:p>
      <text:p text:style-name="P22"><text:span text:style-name="T24"><text:s text:c="4"/></text:span><text:span text:style-name="T23">-</text:span><text:span text:style-name="T24"> <text:s/></text:span><text:span text:style-name="T35">*</text:span><text:span text:style-name="T36">Аннотация:</text:span><text:span text:style-name="T35">*</text:span><text:span text:style-name="T24"> <text:s/>Излагается <text:s/>системный <text:s/>подход <text:s/>к <text:s/>синтезу <text:s/>цифровых <text:s/>автоматов, <text:s/>начиная <text:s/>с <text:s/>булевых <text:s/>функций.</text:span></text:p>
      <text:p text:style-name="P23"/>
      <text:p text:style-name="P22"><text:span text:style-name="T21">###</text:span><text:span text:style-name="T22"> <text:s text:c="3"/>3. <text:s/>Программирование</text:span></text:p>
      <text:p text:style-name="P23"/>
      <text:p text:style-name="P24"><text:span text:style-name="T23">-</text:span><text:span text:style-name="T24"> <text:s/></text:span><text:span text:style-name="T21">**</text:span><text:span text:style-name="T25">Основы алгоритмизации и программирования на языке Python : учебное пособие для вузов / Бунаков П. Ю. ; Бунаков П. Ю. - Санкт-Петербург : Лань, 2026.</text:span><text:span text:style-name="T33"> </text:span></text:p>
      <text:p text:style-name="P25"><text:span text:style-name="T26"><text:s text:c="4"/></text:span><text:span text:style-name="T27">-</text:span><text:span text:style-name="T26"> <text:s/></text:span><text:span text:style-name="T28">*</text:span><text:span text:style-name="T29">Аннотация:</text:span><text:span text:style-name="T28">*</text:span><text:span text:style-name="T26"> <text:s/></text:span><text:span text:style-name="T30">Учебное пособие </text:span><text:span text:style-name="Strong_20_Emphasis"><text:span text:style-name="T30">«Основы алгоритмизации и программирования на языке Python»</text:span></text:span><text:span text:style-name="T31"> </text:span><text:span text:style-name="T30">Павла Юрьевича Бунакова представляет собой практико-ориентированное введение в фундаментальные основы алгоритмизации и программирования на одном из самых востребованных языков — Python.</text:span><text:span text:style-name="T32"> </text:span></text:p>
      <text:p text:style-name="P23"/>
      <text:p text:style-name="P24"><text:span text:style-name="T23">-</text:span><text:span text:style-name="T24"> <text:s/></text:span><text:span text:style-name="T21">**</text:span><text:span text:style-name="T25">Программирование на SQL : учебник и практикум для вузов / Маркин Александр Васильевич ; А. В. Маркин. — 3-е изд., пер. и доп. — Москва : Юрайт, 2026.</text:span><text:span text:style-name="T38"> </text:span></text:p>
      <text:p text:style-name="P24"><text:span text:style-name="T24"><text:s text:c="4"/></text:span><text:span text:style-name="T23">-</text:span><text:span text:style-name="T24"> <text:s/></text:span><text:span text:style-name="T35">*</text:span><text:span text:style-name="T36">Аннотация:</text:span><text:span text:style-name="T35">*</text:span><text:span text:style-name="T24"> </text:span><text:span text:style-name="T39"><text:s/></text:span><text:span text:style-name="T40">Учебник и практикум посвящён языку SQL — как декларативному (запросы), так и процедурному программированию (хранимые процедуры, триггеры). Рассматриваются три современные СУБД: Firebird, Microsoft SQL Server и Oracle Database. Теория сопровождается большим количеством примеров на основе учебной базы данных, приближенной к реальной. Издание включает лабораторный практикум, тесты и дополнительные онлайн-ресурсы для самостоятельной работы. Признан победителем конкурса «Золотой корифей». Соответствует ФГОС ВО. Для студентов IT-направлений и всех изучающих SQL.</text:span><text:span text:style-name="T39"> </text:span></text:p>
      <text:p text:style-name="P23"/>
      <text:p text:style-name="P24"><text:span text:style-name="T23">-</text:span><text:span text:style-name="T24"> <text:s/></text:span><text:span text:style-name="T21">**</text:span><text:span text:style-name="T25">Информатика в 2 ч. Часть 1 : учебник для вузов / Новожилов Олег Петрович ; О. П. Новожилов. — 3-е изд., пер. и доп. — Москва : Юрайт, 2026.</text:span><text:span text:style-name="T33"> </text:span></text:p>
      <text:p text:style-name="P27"><text:span text:style-name="T26"><text:s text:c="4"/></text:span><text:span text:style-name="T27">-</text:span><text:span text:style-name="T26"> <text:s/></text:span><text:span text:style-name="T28">*</text:span><text:span text:style-name="T29">Аннотация:</text:span><text:span text:style-name="T28">*</text:span><text:span text:style-name="T26"> <text:s/></text:span><text:span text:style-name="T30">Учебник </text:span><text:span text:style-name="Strong_20_Emphasis"><text:span text:style-name="T30">«Информатика. Часть 1»</text:span></text:span><text:span text:style-name="T31"> </text:span><text:span text:style-name="T30">Олега Петровича Новожилова представляет собой фундаментальное, переработанное и дополненное издание, предназначенное для студентов высших учебных заведений. Книга имеет гриф Учебно-методического объединения (УМО ВО) и входит в авторитетную серию «Высшее образование» издательства «Юрайт».</text:span><text:span text:style-name="T32"> </text:span></text:p>
      <text:p text:style-name="P23"/>
      <text:p text:style-name="P28"><text:span text:style-name="T23">-</text:span><text:span text:style-name="T24"> <text:s/></text:span><text:span text:style-name="T21">**</text:span><text:span text:style-name="T33">Федоров <text:s/>Д. <text:s/>Ю. <text:s/>Программирование <text:s/>на <text:s/>языке <text:s/>высокого <text:s/>уровня <text:s/>Python: <text:s/>учебное <text:s/>пособие. <text:s text:c="5"/>3 <text:s/>е <text:s/>изд., <text:s/>перераб. <text:s/>и <text:s/>доп. <text:s text:c="5"/>М.: <text:s/>Юрайт, <text:s/>2021.</text:span></text:p>
      <text:p text:style-name="P27"><text:span text:style-name="T26"><text:s text:c="4"/></text:span><text:span text:style-name="T27">-</text:span><text:span text:style-name="T26"> <text:s/></text:span><text:span text:style-name="T28">*</text:span><text:span text:style-name="T29">Аннотация:</text:span><text:span text:style-name="T28">*</text:span><text:span text:style-name="T26"> <text:s/></text:span><text:span text:style-name="T41">Учебное пособие Д. Ю. Федорова </text:span><text:span text:style-name="Strong_20_Emphasis"><text:span text:style-name="T42">«Программирование на языке высокого уровня Python»</text:span></text:span><text:span text:style-name="T41"> (3-е издание, переработанное и дополненное) предназначено для студентов, изучающих основы программирования. Издание соответствует современным </text:span><text:soft-page-break/><text:span text:style-name="T41">требованиям Федерального государственного образовательного стандарта и входит в серию «Высшее образование» издательства «Юрайт».</text:span></text:p>
      <text:p text:style-name="P23"/>
      <text:p text:style-name="P22"><text:span text:style-name="T21">###</text:span><text:span text:style-name="T22"> <text:s text:c="3"/>4. <text:s/>Компьютерные <text:s/>сети <text:s/>и <text:s/>телекоммуникации</text:span></text:p>
      <text:p text:style-name="P23"/>
      <text:p text:style-name="P28"><text:span text:style-name="T23">-</text:span><text:span text:style-name="T24"> <text:s/></text:span><text:span text:style-name="T21">**</text:span><text:span text:style-name="T25">Компьютерные сети и системы связи. Вводный курс : учебное пособие для вузов / Рабчевский Андрей Николаевич ; А. Н. Рабчевский. —Москва : Юрайт, 2026.</text:span><text:span text:style-name="T38"> </text:span></text:p>
      <text:p text:style-name="P28"><text:span text:style-name="T24"><text:s text:c="4"/></text:span><text:span text:style-name="T23">-</text:span><text:span text:style-name="T24"> <text:s/></text:span><text:span text:style-name="T35">*</text:span><text:span text:style-name="T36">Аннотация:</text:span><text:span text:style-name="T35">*</text:span><text:span text:style-name="T24"> <text:s/></text:span><text:span text:style-name="T43">Учебное пособие посвящено базовым понятиям, концепциям и технологиям компьютерных сетей и систем связи, включая историю коммуникаций, модель OSI, способы адресации, коммутации и маршрутизации. Особое внимание уделено современным направлениям конвергенции сетей — VoIP, компьютерной телефонии и системам компьютерно-телефонной интеграции (CTI)</text:span></text:p>
      <text:p text:style-name="P23"/>
      <text:p text:style-name="P28"><text:span text:style-name="T23">-</text:span><text:span text:style-name="T24"> <text:s/></text:span><text:span text:style-name="T21">**</text:span><text:span text:style-name="T25">Компьютерные сети и системы связи. Вводный курс : учебное пособие для спо / Рабчевский Андрей Николаевич ; А. Н. Рабчевский. — Москва : Юрайт, 2026.</text:span><text:span text:style-name="T33"> </text:span></text:p>
      <text:p text:style-name="P28"><text:span text:style-name="T24"><text:s text:c="4"/></text:span><text:span text:style-name="T23">-</text:span><text:span text:style-name="T24"> <text:s/></text:span><text:span text:style-name="T35">*</text:span><text:span text:style-name="T36">Аннотация:</text:span><text:span text:style-name="T35">*</text:span><text:span text:style-name="T24"> <text:s/></text:span><text:span text:style-name="T43">Курс посвящен основным понятиям и технологиям компьютерных сетей и систем связи: от истории коммуникаций и модели OSI до адресации, маршрутизации и VoIP. Особое внимание уделяется современным тенденциям конвергенции, включая компьютерную телефонию и системы CTI.</text:span></text:p>
      <text:p text:style-name="P23"/>
      <text:p text:style-name="P28"><text:span text:style-name="T23">-</text:span><text:span text:style-name="T24"> <text:s/></text:span><text:span text:style-name="T21">**</text:span><text:span text:style-name="T25">Архитектура ЭВМ и вычислительных систем : учебник для вузов / Новожилов Олег Петрович ; О. П. Новожилов. — 2-е изд., испр. и доп. <text:s/>Москва : Юрайт, 2026.</text:span><text:span text:style-name="T33"> </text:span></text:p>
      <text:p text:style-name="P28"><text:span text:style-name="T24"><text:s text:c="4"/></text:span><text:span text:style-name="T23">-</text:span><text:span text:style-name="T24"> <text:s/></text:span><text:span text:style-name="T35">*</text:span><text:span text:style-name="T36">Аннотация:</text:span><text:span text:style-name="T35">*</text:span><text:span text:style-name="T24"> <text:s/></text:span><text:span text:style-name="T43">В учебнике изложены принципы построения и работы устройств современных компьютеров, взаимодействие аппаратных и программных средств, а также основные тенденции развития компьютерной техники. Издание дает целостное представление о структурно-функциональной организации микропроцессоров, компьютерной памяти и вычислительных систем.</text:span></text:p>
      <text:p text:style-name="P23"/>
      <text:p text:style-name="P22"><text:span text:style-name="T21">###</text:span><text:span text:style-name="T22"> <text:s text:c="3"/>5. <text:s/>Базы <text:s/>данных</text:span></text:p>
      <text:p text:style-name="P23"/>
      <text:p text:style-name="P28"><text:span text:style-name="T23">-</text:span><text:span text:style-name="T24"> <text:s/></text:span><text:span text:style-name="T21">**</text:span><text:span text:style-name="T25">Большие данные и NoSQL базы данных : учебное пособие для вузов / Мамедли Р. Э., Казиахмедов Т. Б. ; Мамедли Р. Э.,Казиахмедов Т. Б.; Казиахмедов Т. Б. — 2-е изд., стер. — Санкт-Петербург : Лань, 2026.</text:span><text:span text:style-name="T33"> </text:span></text:p>
      <text:p text:style-name="P28"><text:span text:style-name="T24"><text:s text:c="4"/></text:span><text:span text:style-name="T23">-</text:span><text:span text:style-name="T24"> <text:s/></text:span><text:span text:style-name="T35">*</text:span><text:span text:style-name="T36">Аннотация:</text:span><text:span text:style-name="T35">*</text:span><text:span text:style-name="T24"> <text:s/></text:span><text:span text:style-name="T39"><text:s/></text:span><text:span text:style-name="T40">Учебное пособие посвящено вопросам организации больших данных (Big Data) и принципам проектирования NoSQL-баз данных. В нем изложены характеристики различных систем управления базами данных (СУБД) NoSQL, даны сведения об их теории и практическом применении</text:span></text:p>
      <text:p text:style-name="P23"/>
      <text:p text:style-name="P28"><text:span text:style-name="T23">-</text:span><text:span text:style-name="T24"> <text:s/></text:span><text:span text:style-name="T21">**</text:span><text:span text:style-name="T33">Кузнецов <text:s/>С. <text:s/>Д. <text:s/>Основы <text:s/>баз <text:s/>данных. <text:s text:c="5"/>2 <text:s/>е <text:s/>изд., <text:s/>испр. <text:s text:c="5"/>М.: <text:s/>ИНТУИТ, <text:s/>2023.</text:span></text:p>
      <text:p text:style-name="P28"><text:span text:style-name="T24"><text:s text:c="4"/></text:span><text:span text:style-name="T23">-</text:span><text:span text:style-name="T24"> <text:s/></text:span><text:span text:style-name="T35">*</text:span><text:span text:style-name="T36">Аннотация:</text:span><text:span text:style-name="T35">*</text:span><text:span text:style-name="T24"> <text:s/></text:span><text:span text:style-name="T40">Учебное пособие посвящено вопросам организации больших данных (Big Data) и принципам проектирования NoSQL-баз данных. В нем изложены характеристики различных систем управления базами данных (СУБД) NoSQL, даны сведения об их теории и практическом применении</text:span><text:span text:style-name="T39"> </text:span></text:p>
      <text:p text:style-name="P23"><text:soft-page-break/></text:p>
      <text:p text:style-name="P22"><text:span text:style-name="T21">###</text:span><text:span text:style-name="T22"> <text:s text:c="3"/>6. <text:s/>Искусственный <text:s/>интеллект <text:s/>и <text:s/>машинное <text:s/>обучение</text:span></text:p>
      <text:p text:style-name="P23"/>
      <text:p text:style-name="P28"><text:span text:style-name="T23">-</text:span><text:span text:style-name="T24"> <text:s/></text:span><text:span text:style-name="T21">**</text:span><text:span text:style-name="T25">Анализ данных : учебник для вузов / Мхитарян Владимир Сергеевич, Архипова Марина Юрьевна, Дуброва Татьяна Абрамовна, Миронкина Юлия Николаевна, Сиротин Вячеслав Павлович ; В. С. Мхитарян [и др.] ; под редакцией В. С. Мхитаряна. Москва : Юрайт, 2026.</text:span><text:span text:style-name="T33"> </text:span></text:p>
      <text:p text:style-name="P29"><text:span text:style-name="T24"><text:s text:c="4"/></text:span><text:span text:style-name="T23">-</text:span><text:span text:style-name="T24"> <text:s/></text:span><text:span text:style-name="T35">*</text:span><text:span text:style-name="T36">Аннотация:</text:span><text:span text:style-name="T35">*</text:span><text:span text:style-name="T24"> <text:s/></text:span><text:span text:style-name="T44">Введение <text:s/>в <text:s/>современное <text:s/>машинное <text:s/>обучение: <text:s/>от <text:s/>ансамблевых <text:s/>методов <text:s/>до <text:s/>глубокого <text:s/>обучения. <text:s/>Рассматриваются <text:s/>классы <text:s/>задач <text:s/>и <text:s/>метрики <text:s/>качества.</text:span></text:p>
      <text:p text:style-name="P23"/>
      <text:p text:style-name="P22"><text:span text:style-name="T23">-</text:span><text:span text:style-name="T24"> <text:s/></text:span><text:span text:style-name="T21">**</text:span><text:span text:style-name="T34">Галыгина <text:s/>И. <text:s/>В. <text:s/>Основы <text:s/>искусственного <text:s/>интеллекта. <text:s/>Лабораторный <text:s/>практикум.</text:span><text:span text:style-name="T21">**</text:span><text:span text:style-name="T34"> <text:s/>— <text:s/>2-е <text:s/>изд., <text:s/>стер. <text:s/>— <text:s/>СПб.: <text:s/>Лань, <text:s/>2024.</text:span></text:p>
      <text:p text:style-name="P22"><text:span text:style-name="T24"><text:s text:c="4"/></text:span><text:span text:style-name="T23">-</text:span><text:span text:style-name="T24"> <text:s/></text:span><text:span text:style-name="T35">*</text:span><text:span text:style-name="T36">Аннотация:</text:span><text:span text:style-name="T35">*</text:span><text:span text:style-name="T24"> <text:s/>Практикум <text:s/>по <text:s/>созданию <text:s/>систем <text:s/>ИИ <text:s/>на <text:s/>Python: <text:s/>обучение <text:s/>нейронных <text:s/>сетей, <text:s/>Big <text:s/>Data, <text:s/>анализ <text:s/>данных.</text:span></text:p>
      <text:p text:style-name="P23"/>
      <text:p text:style-name="P29"><text:span text:style-name="T23">-</text:span><text:span text:style-name="T24"> <text:s/></text:span><text:span text:style-name="T21">**</text:span><text:span text:style-name="T37">Машинное <text:s/>обучение <text:s/>и <text:s/>искусственный <text:s/>интеллект: <text:s/>учебное <text:s/>пособие <text:s/>для <text:s/>вузов. <text:s text:c="5"/>СПб.: <text:s/>Лань, <text:s/>2024.</text:span></text:p>
      <text:p text:style-name="P29"><text:span text:style-name="T24"><text:s text:c="4"/></text:span><text:span text:style-name="T23">-</text:span><text:span text:style-name="T24"> <text:s/></text:span><text:span text:style-name="T35">*</text:span><text:span text:style-name="T36">Аннотация:</text:span><text:span text:style-name="T35">*</text:span><text:span text:style-name="T24"> <text:s/></text:span><text:span text:style-name="T45">Введение <text:s/>в <text:s/>современное <text:s/>машинное <text:s/>обучение: <text:s/>от <text:s/>ансамблевых <text:s/>методов <text:s/>до <text:s/>глубокого <text:s/>обучения. <text:s/>Рассматриваются <text:s/>классы <text:s/>задач <text:s/>и <text:s/>метрики <text:s/>качества.</text:span></text:p>
      <text:p text:style-name="P23"/>
      <text:p text:style-name="P22"><text:span text:style-name="T21">###</text:span><text:span text:style-name="T22"> <text:s text:c="3"/>7. <text:s/>Большие <text:s/>данные <text:s/>и <text:s/>статистика</text:span></text:p>
      <text:p text:style-name="P23"/>
      <text:p text:style-name="P29"><text:span text:style-name="T23">-</text:span><text:span text:style-name="T24"> <text:s/></text:span><text:span text:style-name="T21">**</text:span><text:span text:style-name="T25">Статистическая обработка и анализ данных в гидрометеорологии / Вильфанд Р. М., Киктев Д. Б., Бакулин С. А. ; Вильфанд Р. М.,Киктев Д. Б.,Бакулин С. А. — Москва : РТУ МИРЭА, 2022.</text:span><text:span text:style-name="T33"> </text:span></text:p>
      <text:p text:style-name="P29"><text:span text:style-name="T24"><text:s text:c="4"/></text:span><text:span text:style-name="T23">-</text:span><text:span text:style-name="T24"> <text:s/></text:span><text:span text:style-name="T35">*</text:span><text:span text:style-name="T36">Аннотация:</text:span><text:span text:style-name="T35">*</text:span><text:span text:style-name="T24"> <text:s/></text:span><text:span text:style-name="T43">В пособии изложены статистические методы обработки гидрометеорологических данных: контроль качества, корреляционный и регрессионный анализ, анализ временных рядов, оценка экстремальных явлений. Предназначено для студентов гидрометеорологических специальностей и специалистов в области гидрологии и климатологии.</text:span></text:p>
      <text:p text:style-name="P23"/>
      <text:p text:style-name="P29"><text:span text:style-name="T23">-</text:span><text:span text:style-name="T24"> <text:s/></text:span><text:span text:style-name="T21">**</text:span><text:span text:style-name="T25">Анализ больших данных в сфере образования: методология и технологии : монография / Фиофанова О. А. ; Российский фонд фундаментальных исследований. —Москва : ДЕЛО, 2020.</text:span><text:span text:style-name="T33"> </text:span></text:p>
      <text:p text:style-name="P29"><text:span text:style-name="T24"><text:s text:c="4"/></text:span><text:span text:style-name="T23">-</text:span><text:span text:style-name="T24"> <text:s/></text:span><text:span text:style-name="T35">*</text:span><text:span text:style-name="T36">Аннотация:</text:span><text:span text:style-name="T35">*</text:span><text:span text:style-name="T24"> <text:s/></text:span><text:span text:style-name="T40">Монография посвящена методологии и технологиям анализа больших данных в образовании: от сбора цифровых следов студентов до прогнозирования успеваемости и персонализации обучения.</text:span><text:span text:style-name="T39"> </text:span></text:p>
      <text:p text:style-name="P23"/>
      <text:p text:style-name="P22"><text:span text:style-name="T21">###</text:span><text:span text:style-name="T22"> <text:s text:c="3"/>8. <text:s/>Компьютерная <text:s/>графика <text:s/>и <text:s/>моделирование</text:span></text:p>
      <text:p text:style-name="P23"/>
      <text:p text:style-name="P22"><text:span text:style-name="T23">-</text:span><text:span text:style-name="T24"> <text:s/></text:span><text:span text:style-name="T21">**</text:span><text:span text:style-name="T34">Боресков <text:s/>А. <text:s/>В., <text:s/>Шикин <text:s/>Е. <text:s/>В. <text:s/>Основы <text:s/>компьютерной <text:s/>графики.</text:span><text:span text:style-name="T21">**</text:span><text:span text:style-name="T24"> <text:s/>— <text:s/>2-е <text:s/>изд. <text:s/>— <text:s/>М.: <text:s/>Юрайт, <text:s/>2023.</text:span></text:p>
      <text:p text:style-name="P22"><text:soft-page-break/><text:span text:style-name="T24"><text:s text:c="4"/></text:span><text:span text:style-name="T23">-</text:span><text:span text:style-name="T24"> <text:s/></text:span><text:span text:style-name="T35">*</text:span><text:span text:style-name="T36">Аннотация:</text:span><text:span text:style-name="T35">*</text:span><text:span text:style-name="T24"> <text:s/>Базовые <text:s/>алгоритмы, <text:s/>методы <text:s/>и <text:s/>модели <text:s/>компьютерной <text:s/>графики.</text:span></text:p>
      <text:p text:style-name="P23"/>
      <text:p text:style-name="P22"><text:span text:style-name="T23">-</text:span><text:span text:style-name="T24"> <text:s/></text:span><text:span text:style-name="T21">**</text:span><text:span text:style-name="T34">Математическое <text:s/>и <text:s/>компьютерное <text:s/>моделирование: <text:s/>учебное <text:s/>пособие <text:s/>для <text:s/>вузов</text:span><text:span text:style-name="T21">**</text:span><text:span text:style-name="T24"> <text:s/>/ <text:s/>Бугров <text:s/>А. <text:s/>— <text:s/>М.: <text:s/>Юрайт, <text:s/>2025.</text:span></text:p>
      <text:p text:style-name="P22"><text:span text:style-name="T24"><text:s text:c="4"/></text:span><text:span text:style-name="T23">-</text:span><text:span text:style-name="T24"> <text:s/></text:span><text:span text:style-name="T35">*</text:span><text:span text:style-name="T36">Аннотация:</text:span><text:span text:style-name="T35">*</text:span><text:span text:style-name="T24"> <text:s/>Методы <text:s/>создания <text:s/>аналитических <text:s/>и <text:s/>численных <text:s/>моделей, <text:s/>основы <text:s/>метода <text:s/>статистических <text:s/>испытаний.</text:span></text:p>
      <text:p text:style-name="P23"/>
      <text:p text:style-name="P22"><text:span text:style-name="T21">###</text:span><text:span text:style-name="T22"> <text:s text:c="3"/>9. <text:s/></text:span><text:span text:style-name="T46">Проектная</text:span><text:span text:style-name="T22"> <text:s/></text:span><text:span text:style-name="T46">деятельность</text:span><text:span text:style-name="T22"> <text:s/></text:span><text:span text:style-name="T46">и</text:span><text:span text:style-name="T22"> <text:s/></text:span><text:span text:style-name="T46">технологии</text:span><text:span text:style-name="T22"> <text:s/></text:span><text:span text:style-name="T46">разработки</text:span><text:span text:style-name="T22"> <text:s/></text:span><text:span text:style-name="T46">ПО</text:span></text:p>
      <text:p text:style-name="P23"/>
      <text:p text:style-name="P22"><text:span text:style-name="T23">-</text:span><text:span text:style-name="T24"> <text:s/></text:span><text:span text:style-name="T21">**</text:span><text:span text:style-name="T34">Кислицын <text:s/>Е. <text:s/>В., <text:s/>Панов <text:s/>М. <text:s/>А. <text:s/>Современные <text:s/>технологии <text:s/>разработки <text:s/>программного <text:s/>обеспечения.</text:span><text:span text:style-name="T21">**</text:span><text:span text:style-name="T24"> <text:s/>— <text:s/>Екатеринбург: <text:s/>УрГЭУ, <text:s/>2021.</text:span></text:p>
      <text:p text:style-name="P22"><text:span text:style-name="T24"><text:s text:c="4"/></text:span><text:span text:style-name="T23">-</text:span><text:span text:style-name="T24"> <text:s/></text:span><text:span text:style-name="T35">*</text:span><text:span text:style-name="T36">Аннотация:</text:span><text:span text:style-name="T35">*</text:span><text:span text:style-name="T24"> <text:s/>Методологии <text:s/>Agile <text:s/>и <text:s/>Scrum, <text:s/>инструменты <text:s/>Git, <text:s/>концепция <text:s/>непрерывной <text:s/>интеграции <text:s/>CI/CD.</text:span></text:p>
      <text:p text:style-name="P23"/>
      <text:p text:style-name="P22"><text:span text:style-name="T23">-</text:span><text:span text:style-name="T24"> <text:s/></text:span><text:span text:style-name="T21">**</text:span><text:span text:style-name="T34">Трусов <text:s/>А. <text:s/>В. <text:s/>Технология <text:s/>проектирования <text:s/>информационных <text:s/>систем.</text:span><text:span text:style-name="T21">**</text:span><text:span text:style-name="T24"> <text:s/>— <text:s/>Вологда: <text:s/>Инфра-Инженерия, <text:s/>2023.</text:span></text:p>
      <text:p text:style-name="P22"><text:span text:style-name="T24"><text:s text:c="4"/></text:span><text:span text:style-name="T23">-</text:span><text:span text:style-name="T24"> <text:s/></text:span><text:span text:style-name="T35">*</text:span><text:span text:style-name="T36">Аннотация:</text:span><text:span text:style-name="T35">*</text:span><text:span text:style-name="T24"> <text:s/>Этапы <text:s/>проектирования <text:s/>ИС, <text:s/>методы <text:s/>стандартизации, <text:s/>оформление <text:s/>проектной <text:s/>документации.</text:span></text:p>
      <text:p text:style-name="P30"/>
      <text:p text:style-name="P31" loext:marker-style-name="T20"><draw:frame draw:style-name="fr1" draw:name="Рисунок 1" text:anchor-type="as-char" svg:width="9.209cm" svg:height="9.527cm" draw:z-index="0"><draw:image xlink:href="Pictures/100000010000012400000121D28E14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modern" style:font-pitch="fixed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Анастасия Грудинина</meta:initial-creator>
    <meta:editing-cycles>6</meta:editing-cycles>
    <meta:creation-date>2026-05-04T23:28:00</meta:creation-date>
    <dc:date>2026-05-11T13:10:04.311409300</dc:date>
    <meta:editing-duration>PT26M8S</meta:editing-duration>
    <meta:generator>LibreOffice/26.2.1.2$Windows_X86_64 LibreOffice_project/620$Build-2</meta:generator>
    <meta:document-statistic meta:table-count="0" meta:image-count="1" meta:object-count="0" meta:page-count="10" meta:paragraph-count="96" meta:word-count="2555" meta:character-count="20612" meta:non-whitespace-character-count="16930"/>
    <meta:user-defined meta:name="AppVersion">16.0000</meta:user-defined>
    <meta:template xlink:type="simple" xlink:actuate="onRequest" xlink:title="Normal.dotm" xlink:href=""/>
  </office:meta>
</office:document-meta>
</file>